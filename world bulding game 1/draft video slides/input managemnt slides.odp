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5000002255A16F405.png" manifest:media-type="image/png"/>
  <manifest:file-entry manifest:full-path="Pictures/10000001000002B0000000834C314D92.png" manifest:media-type="image/png"/>
  <manifest:file-entry manifest:full-path="Pictures/1000000100000262000001E4E9C6D9AB.png" manifest:media-type="image/png"/>
  <manifest:file-entry manifest:full-path="Pictures/1000000000000088000000862D9EE71B.png" manifest:media-type="image/png"/>
  <manifest:file-entry manifest:full-path="Pictures/10000001000000880000008661922319.png" manifest:media-type="image/png"/>
  <manifest:file-entry manifest:full-path="Pictures/10000000000001790000016A6B543D83.png" manifest:media-type="image/png"/>
  <manifest:file-entry manifest:full-path="Pictures/1000000000000069000000670C489800.png" manifest:media-type="image/png"/>
  <manifest:file-entry manifest:full-path="Pictures/100000000000006900000067659E7CB6.png" manifest:media-type="image/png"/>
  <manifest:file-entry manifest:full-path="Pictures/100000010000006E0000006B63B5DD22.png" manifest:media-type="image/png"/>
  <manifest:file-entry manifest:full-path="Pictures/100000000000006E0000006BB829D614.png" manifest:media-type="image/png"/>
  <manifest:file-entry manifest:full-path="Pictures/10000000000000880000008680787181.png" manifest:media-type="image/png"/>
  <manifest:file-entry manifest:full-path="Pictures/100000000000006E0000006B0DF23044.png" manifest:media-type="image/png"/>
  <manifest:file-entry manifest:full-path="Pictures/1000000100000069000000671914F530.png" manifest:media-type="image/png"/>
  <manifest:file-entry manifest:full-path="Pictures/100000010000006900000067CF3F89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color="#333333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solid" draw:fill-color="#fffff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14cm" fo:min-width="1.06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53cm" fo:min-width="0.707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96cm" fo:min-width="0.317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96cm" fo:min-width="0.419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09cm" fo:min-width="0.791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45cm" fo:min-width="0.69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78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18cm" fo:min-width="0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238cm" fo:min-width="2.459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202cm" fo:min-width="2.4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0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87cm" fo:min-width="0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61cm" fo:min-width="0.751cm" style:protect="siz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584cm" fo:min-width="0.75cm" style:protect="siz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3.524cm" fo:min-width="3.274cm" style:protect="size" loext:decorative="false"/>
    </style:style>
    <style:style style:name="gr23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3.524cm" fo:min-width="3.274cm" style:protect="siz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518cm" fo:min-width="1.268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32" style:family="graphic" style:parent-style-name="standard">
      <style:graphic-properties svg:stroke-color="#ff0000" draw:fill="none" loext:fill-use-slide-background="false" draw:opacity="100%" draw:textarea-horizontal-align="justify" draw:textarea-vertical-align="middle" draw:auto-grow-height="false" fo:min-height="3.71cm" fo:min-width="5.058cm" loext:decorative="false"/>
    </style:style>
    <style:style style:name="gr33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768cm" loext:decorative="false"/>
    </style:style>
    <style:style style:name="gr34" style:family="graphic" style:parent-style-name="standard">
      <style:graphic-properties svg:stroke-color="#ff0000" draw:fill="none" loext:fill-use-slide-background="false" draw:opacity="100%" draw:textarea-horizontal-align="justify" draw:textarea-vertical-align="middle" draw:auto-grow-height="false" fo:min-height="3.71cm" fo:min-width="8.997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8.278cm" loext:decorative="false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39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2.545cm" loext:decorative="false"/>
    </style:style>
    <style:style style:name="gr40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975cm" loext:decorative="false"/>
    </style:style>
    <style:style style:name="gr41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632cm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2.475cm" fo:min-width="3.257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977cm" fo:min-width="1.84cm" loext:decorative="false"/>
    </style:style>
    <style:style style:name="gr4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50pt" style:font-size-asian="50pt" style:font-size-complex="50pt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="none" draw:opacity="100%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02cm" svg:height="3.465cm" svg:x="4.904cm" svg:y="4.713cm">
          <draw:image xlink:href="Pictures/10000001000002B0000000834C314D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Managing <text:s/>inputs</text:p>
          </draw:text-box>
        </draw:frame>
        <draw:frame draw:style-name="gr1" draw:text-style-name="P1" draw:layer="layout" svg:width="5.639cm" svg:height="4.474cm" svg:x="0.516cm" svg:y="4.001cm">
          <draw:image xlink:href="Pictures/1000000100000262000001E4E9C6D9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63B5DD22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F3F8940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1914F530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6192231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6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796cm" svg:height="2.428cm" svg:x="2.143cm" svg:y="0.48cm">
          <draw:text-box>
            <text:p><text:span text:style-name="T1">Each input one at a time shown when i spea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22cm" svg:y="5.552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7.614cm 6.617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4.56cm" svg:y="5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0.932cm" svg:y="5.7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0.933cm" svg:y="6.7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9.755cm 2.168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57cm" svg:y="2.419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595cm" svg:y="1.9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0.967cm" svg:y="2.61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0.968cm" svg:y="3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8" draw:layer="layout" svg:width="1.689cm" svg:height="1.689cm" svg:x="15.614cm" svg:y="2.629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46cm" svg:y="3.865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05cm" svg:y="4.056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543cm" svg:y="3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2.019cm" svg:height="1.932cm" svg:x="21.533cm" svg:y="4.457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15">
          <draw:custom-shape draw:style-name="gr16" draw:text-style-name="P6" draw:layer="layout" svg:width="2.959cm" svg:height="0.488cm" svg:x="17.669cm" svg:y="4.5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67cm" svg:y="5.5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15.987cm 3.927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10.827cm" svg:y="3.7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2.019cm" svg:height="1.932cm" svg:x="7.659cm" svg:y="11.89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618cm" svg:y="12.081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456cm" svg:y="11.6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21.673cm" svg:y="12.77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21.674cm" svg:y="13.771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15.9cm 11.952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10.74cm" svg:y="11.75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6" draw:layer="layout" svg:width="2.315cm" svg:height="2.298cm" svg:x="16.329cm" svg:y="11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1.566cm" svg:height="1.741cm" svg:x="19.252cm" svg:y="12.326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25.589cm" svg:y="12.832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2 ways</text:p>
          </draw:text-box>
        </draw:frame>
        <draw:frame draw:style-name="gr1" draw:text-style-name="P1" draw:layer="layout" svg:width="8.895cm" svg:height="7.057cm" svg:x="15.87cm" svg:y="4.165cm">
          <draw:image xlink:href="Pictures/1000000100000262000001E4E9C6D9AB.png" xlink:type="simple" xlink:show="embed" xlink:actuate="onLoad" draw:mime-type="image/png">
            <text:p/>
          </draw:image>
        </draw:frame>
        <draw:frame draw:style-name="gr1" draw:text-style-name="P1" draw:layer="layout" svg:width="10.557cm" svg:height="7.06cm" svg:x="1.441cm" svg:y="4.255cm">
          <draw:image xlink:href="Pictures/1000000100000335000002255A16F4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-0.807389311972577) translate (2.925cm 3.18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6.057cm" svg:height="6.458cm" svg:x="11.036cm" svg:y="3.429cm">
          <draw:text-box>
            <text:p><text:span text:style-name="T2">7 <text:s/>8 <text:s/>9</text:span></text:p>
            <text:p><text:span text:style-name="T2">4 <text:s/>5 <text:s/>6</text:span></text:p>
            <text:p><text:span text:style-name="T2">1 <text:s/>2 <text:s/>3</text:span></text:p>
          </draw:text-box>
        </draw:frame>
        <draw:frame draw:style-name="gr19" draw:text-style-name="P10" draw:layer="layout" svg:width="9.503cm" svg:height="7.137cm" svg:x="18.382cm" svg:y="3.533cm">
          <draw:text-box>
            <text:p><text:span text:style-name="T2">UL <text:s/>U <text:s text:c="2"/>UR</text:span></text:p>
            <text:p><text:span text:style-name="T2">L <text:s text:c="4"/>N <text:s text:c="4"/>R</text:span></text:p>
            <text:p><text:span text:style-name="T2">DL <text:s/>D <text:s text:c="2"/>D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ypes of blocking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ages of sf6(regular and parry),smash b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How blocking works</text:p>
          </draw:text-box>
        </draw:frame>
        <draw:custom-shape draw:style-name="gr20" draw:text-style-name="P6" draw:layer="layout" svg:width="2.5cm" svg:height="2.5cm" draw:transform="rotate (-1.5707963267949) translate (7.767cm 3.7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6" draw:layer="layout" svg:width="2.5cm" svg:height="2.5cm" draw:transform="rotate (-1.5707963267949) translate (7.527cm 10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6" draw:layer="layout" svg:width="2.5cm" svg:height="2.5cm" draw:transform="rotate (-1.5707963267949) translate (9.654cm 7.0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2" draw:text-style-name="P6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1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e subjective Projectile case </text:p>
          </draw:text-box>
        </draw:frame>
        <draw:custom-shape draw:style-name="gr22" draw:text-style-name="P6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1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6" draw:layer="layout" svg:width="2.5cm" svg:height="2.5cm" svg:x="6.56cm" svg:y="6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game engine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How to make an input manger fo fighting games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63B5DD22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F3F8940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1914F530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6192231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6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796cm" svg:height="2.428cm" svg:x="2.143cm" svg:y="0.48cm">
          <draw:text-box>
            <text:p><text:span text:style-name="T1">Each input one at a time shown when i speak</text:span></text:p>
          </draw:text-box>
        </draw:frame>
        <draw:custom-shape draw:style-name="gr14" draw:text-style-name="P6" draw:layer="layout" svg:width="2.315cm" svg:height="2.298cm" svg:x="10.829cm" svg:y="3.7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1.452cm" svg:y="7.7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1.453cm" svg:y="8.7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535cm" svg:y="1.078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.243cm" svg:y="1.43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6.075cm 3.4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5" draw:text-style-name="P9" draw:layer="layout" svg:width="3.492cm" svg:height="3.095cm" svg:x="21.863cm" svg:y="1.09cm">
          <draw:text-box>
            <text:p><text:span text:style-name="T1">Some attack</text:span></text:p>
            <text:p><text:span text:style-name="T1">DQCF+LP</text:span></text:p>
            <text:p><text:span text:style-name="T1"/></text:p>
          </draw:text-box>
        </draw:frame>
        <draw:frame draw:style-name="gr3" draw:text-style-name="P3" draw:layer="layout" svg:width="2.909cm" svg:height="2.83cm" svg:x="12.959cm" svg:y="0.975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10.011cm" svg:y="1.0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581cm" svg:y="1.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582cm" svg:y="2.522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svg:x="1.958cm" svg:y="4.88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565cm" svg:y="5.14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8.017cm 6.90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6" draw:text-style-name="P9" draw:layer="layout" svg:width="3.492cm" svg:height="3.806cm" svg:x="21.711cm" svg:y="4.954cm">
          <draw:text-box>
            <text:p><text:span text:style-name="T1">Some other attack</text:span></text:p>
            <text:p text:style-name="P12"><text:span text:style-name="T1">FDPD+LP</text:span></text:p>
            <text:p><text:span text:style-name="T1"/></text:p>
          </draw:text-box>
        </draw:frame>
        <draw:frame draw:style-name="gr3" draw:text-style-name="P3" draw:layer="layout" svg:width="2.909cm" svg:height="2.83cm" svg:x="12.807cm" svg:y="4.839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9.859cm" svg:y="4.9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429cm" svg:y="5.3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43cm" svg:y="6.386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1.566cm" svg:height="1.741cm" svg:x="7.623cm" svg:y="8.251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.843cm" svg:y="8.593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0.776322451287078) translate (4.287cm 9.05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2.534cm" svg:height="2.497cm" svg:x="13.17cm" svg:y="7.984cm">
          <draw:image xlink:href="Pictures/1000000000000088000000862D9EE71B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9.955cm" svg:y="8.0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505cm" svg:y="8.76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506cm" svg:y="9.75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9" draw:layer="layout" svg:width="4.29cm" svg:height="4.517cm" svg:x="21.902cm" svg:y="8.552cm">
          <draw:text-box>
            <text:p><text:span text:style-name="T1">Some other other attack</text:span></text:p>
            <text:p text:style-name="P12"><text:span text:style-name="T1">DQCB e+HK</text:span></text:p>
            <text:p><text:span text:style-name="T1"/></text:p>
          </draw:text-box>
        </draw:frame>
        <draw:frame draw:style-name="gr28" draw:text-style-name="P9" draw:layer="layout" svg:width="5.775cm" svg:height="0.962cm" svg:x="21.235cm" svg:y="0.094cm">
          <draw:text-box>
            <text:p><text:span text:style-name="T1">Add images 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0" draw:text-style-name="P14" draw:layer="layout" svg:width="3.116cm" svg:height="1.673cm" svg:x="22.727cm" svg:y="12.405cm">
          <draw:text-box>
            <text:p>Newest</text:p>
          </draw:text-box>
        </draw:frame>
        <draw:frame draw:style-name="gr31" draw:text-style-name="P15" draw:layer="layout" svg:width="6.643cm" svg:height="2.986cm" svg:x="2.209cm" svg:y="0.459cm">
          <draw:text-box>
            <text:p text:style-name="P12">A scanner of the inputs showing when a code is valid slowly</text:p>
          </draw:text-box>
        </draw:frame>
        <draw:custom-shape draw:style-name="gr32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9.497cm" svg:height="3.96cm" svg:x="7.08cm" svg:y="4.4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9.497cm" svg:height="3.96cm" svg:x="9.631cm" svg:y="4.4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8.778cm" svg:height="3.96cm" svg:x="7.782cm" svg:y="8.4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0" draw:text-style-name="P14" draw:layer="layout" svg:width="3.116cm" svg:height="1.673cm" svg:x="22.727cm" svg:y="12.405cm">
          <draw:text-box>
            <text:p>Newest</text:p>
          </draw:text-box>
        </draw:frame>
        <draw:frame draw:style-name="gr36" draw:text-style-name="P15" draw:layer="layout" svg:width="6.643cm" svg:height="2.986cm" svg:x="2.209cm" svg:y="0.459cm">
          <draw:text-box>
            <text:p text:style-name="P12">Then whitch comes first fqcu or dqcf </text:p>
          </draw:text-box>
        </draw:frame>
        <draw:custom-shape draw:style-name="gr32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9.497cm" svg:height="3.96cm" svg:x="7.08cm" svg:y="4.4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9.497cm" svg:height="3.96cm" svg:x="9.631cm" svg:y="4.4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8.778cm" svg:height="3.96cm" svg:x="7.782cm" svg:y="8.4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9" draw:text-style-name="P6" draw:layer="layout" svg:width="1.619cm" svg:height="1.618cm" svg:x="1.556cm" svg:y="13.05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4.452cm 14.871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5.628cm" svg:y="12.6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0.11cm" svg:y="1.1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3.006cm 2.99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24.182cm" svg:y="0.75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7" draw:text-style-name="P13" draw:layer="layout" svg:width="1.067cm" svg:height="0.962cm" svg:x="17.674cm" svg:y="1.35cm">
          <draw:text-box>
            <text:p>or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5.377cm" svg:y="0.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0.085cm" svg:y="0.80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3.917cm 2.8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20.1cm" svg:y="9.22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.768cm" svg:y="9.6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1.92cm 11.46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43cm" svg:y="9.713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8.036cm" svg:y="9.71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0" draw:text-style-name="P14" draw:layer="layout" svg:width="3.116cm" svg:height="1.673cm" svg:x="22.727cm" svg:y="12.405cm">
          <draw:text-box>
            <text:p>Newest</text:p>
          </draw:text-box>
        </draw:frame>
        <draw:frame draw:style-name="gr38" draw:text-style-name="P15" draw:layer="layout" svg:width="6.643cm" svg:height="3.806cm" svg:x="1.771cm" svg:y="0cm">
          <draw:text-box>
            <text:p text:style-name="P12">A scanner of the inputs showing when a code is valid slowly and this time with gaps</text:p>
          </draw:text-box>
        </draw:frame>
        <draw:custom-shape draw:style-name="gr39" draw:text-style-name="P16" draw:layer="layout" svg:width="3.045cm" svg:height="3.96cm" svg:x="19.432cm" svg:y="8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566cm" svg:height="1.741cm" draw:transform="rotate (2.42949831877611) translate (14.851cm 11.64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17.745cm 11.60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0" draw:text-style-name="P16" draw:layer="layout" svg:width="2.475cm" svg:height="3.96cm" svg:x="10.602cm" svg:y="8.4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.132cm" svg:height="3.96cm" svg:x="1.618cm" svg:y="8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hen using append</text:p>
          </draw:text-box>
        </draw:frame>
        <draw:custom-shape draw:style-name="gr42" draw:text-style-name="P6" draw:layer="layout" svg:width="3.757cm" svg:height="2.725cm" svg:x="19.817cm" svg:y="7.039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8.494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8.494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</text:p>
          </draw:text-box>
        </draw:frame>
        <draw:custom-shape draw:style-name="gr42" draw:text-style-name="P6" draw:layer="layout" svg:width="3.757cm" svg:height="2.725cm" svg:x="19.817cm" svg:y="7.039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8.494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8.494cm">
          <text:p/>
        </draw:line>
        <draw:frame draw:style-name="gr37" draw:text-style-name="P13" draw:layer="layout" svg:width="0.855cm" svg:height="0.962cm" svg:x="1.455cm" svg:y="5.954cm">
          <draw:text-box>
            <text:p>5</text:p>
          </draw:text-box>
        </draw:frame>
        <draw:frame draw:style-name="gr37" draw:text-style-name="P13" draw:layer="layout" svg:width="0.855cm" svg:height="0.962cm" svg:x="1.482cm" svg:y="10.875cm">
          <draw:text-box>
            <text:p>5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</text:p>
          </draw:text-box>
        </draw:frame>
        <draw:custom-shape draw:style-name="gr42" draw:text-style-name="P6" draw:layer="layout" svg:width="3.757cm" svg:height="2.725cm" svg:x="19.817cm" svg:y="7.039cm">
          <text:p text:style-name="P6">99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8.494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8.494cm">
          <text:p/>
        </draw:line>
        <draw:frame draw:style-name="gr37" draw:text-style-name="P13" draw:layer="layout" svg:width="0.855cm" svg:height="0.962cm" svg:x="1.455cm" svg:y="5.954cm">
          <draw:text-box>
            <text:p>5</text:p>
          </draw:text-box>
        </draw:frame>
        <draw:frame draw:style-name="gr37" draw:text-style-name="P13" draw:layer="layout" svg:width="0.855cm" svg:height="0.962cm" svg:x="1.482cm" svg:y="10.875cm">
          <draw:text-box>
            <text:p>5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</text:p>
          </draw:text-box>
        </draw:frame>
        <draw:custom-shape draw:style-name="gr42" draw:text-style-name="P6" draw:layer="layout" svg:width="3.757cm" svg:height="2.725cm" svg:x="19.817cm" svg:y="7.039cm">
          <text:p text:style-name="P6">99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8.494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8.494cm">
          <text:p/>
        </draw:line>
        <draw:frame draw:style-name="gr37" draw:text-style-name="P13" draw:layer="layout" svg:width="1.208cm" svg:height="0.962cm" svg:x="1.455cm" svg:y="5.954cm">
          <draw:text-box>
            <text:p>99</text:p>
          </draw:text-box>
        </draw:frame>
        <draw:frame draw:style-name="gr37" draw:text-style-name="P13" draw:layer="layout" svg:width="1.208cm" svg:height="0.962cm" svg:x="1.482cm" svg:y="10.875cm">
          <draw:text-box>
            <text:p>99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 and duplicate</text:p>
          </draw:text-box>
        </draw:frame>
        <draw:custom-shape draw:style-name="gr42" draw:text-style-name="P6" draw:layer="layout" svg:width="3.757cm" svg:height="2.725cm" svg:x="19.817cm" svg:y="9.447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6.271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10.928cm">
          <text:p/>
        </draw:line>
        <draw:custom-shape draw:style-name="gr42" draw:text-style-name="P6" draw:layer="layout" svg:width="3.757cm" svg:height="2.725cm" svg:x="19.817cm" svg:y="4.71cm">
          <text:p text:style-name="P6">5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855cm" svg:height="0.962cm" svg:x="1.455cm" svg:y="5.955cm">
          <draw:text-box>
            <text:p>5</text:p>
          </draw:text-box>
        </draw:frame>
        <draw:frame draw:style-name="gr37" draw:text-style-name="P13" draw:layer="layout" svg:width="0.855cm" svg:height="0.962cm" svg:x="1.482cm" svg:y="10.876cm">
          <draw:text-box>
            <text:p>5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 and duplicate</text:p>
          </draw:text-box>
        </draw:frame>
        <draw:custom-shape draw:style-name="gr42" draw:text-style-name="P6" draw:layer="layout" svg:width="3.757cm" svg:height="2.725cm" svg:x="19.817cm" svg:y="9.447cm">
          <text:p text:style-name="P6">99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6.271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10.928cm">
          <text:p/>
        </draw:line>
        <draw:custom-shape draw:style-name="gr42" draw:text-style-name="P6" draw:layer="layout" svg:width="3.757cm" svg:height="2.725cm" svg:x="19.817cm" svg:y="4.71cm">
          <text:p text:style-name="P6">5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855cm" svg:height="0.962cm" svg:x="1.455cm" svg:y="5.955cm">
          <draw:text-box>
            <text:p>5</text:p>
          </draw:text-box>
        </draw:frame>
        <draw:frame draw:style-name="gr37" draw:text-style-name="P13" draw:layer="layout" svg:width="0.855cm" svg:height="0.962cm" svg:x="1.482cm" svg:y="10.876cm">
          <draw:text-box>
            <text:p>5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 and duplicate</text:p>
          </draw:text-box>
        </draw:frame>
        <draw:custom-shape draw:style-name="gr42" draw:text-style-name="P6" draw:layer="layout" svg:width="3.757cm" svg:height="2.725cm" svg:x="19.817cm" svg:y="9.447cm">
          <text:p text:style-name="P6">99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4" draw:text-style-name="P1" draw:layer="layout" svg:x1="7.197cm" svg:y1="6.933cm" svg:x2="19.817cm" svg:y2="6.271cm">
          <text:p/>
        </draw:line>
        <draw:custom-shape draw:style-name="gr43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line draw:style-name="gr45" draw:text-style-name="P1" draw:layer="layout" svg:x1="7.223cm" svg:y1="11.086cm" svg:x2="19.817cm" svg:y2="10.928cm">
          <text:p/>
        </draw:line>
        <draw:custom-shape draw:style-name="gr42" draw:text-style-name="P6" draw:layer="layout" svg:width="3.757cm" svg:height="2.725cm" svg:x="19.817cm" svg:y="4.71cm">
          <text:p text:style-name="P6">5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855cm" svg:height="0.962cm" svg:x="1.455cm" svg:y="5.955cm">
          <draw:text-box>
            <text:p>5</text:p>
          </draw:text-box>
        </draw:frame>
        <draw:frame draw:style-name="gr37" draw:text-style-name="P13" draw:layer="layout" svg:width="1.208cm" svg:height="0.962cm" svg:x="1.482cm" svg:y="10.876cm">
          <draw:text-box>
            <text:p>99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800080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21:17:20.095993390</meta:creation-date>
    <dc:date>2026-05-18T19:08:32.737331965</dc:date>
    <meta:editing-duration>PT1H26M33S</meta:editing-duration>
    <meta:editing-cycles>5</meta:editing-cycles>
    <meta:generator>LibreOffice/26.2.3.2$Linux_X86_64 LibreOffice_project/d4d5ed47b6084125f28d269a5650105d54dde034</meta:generator>
    <meta:document-statistic meta:object-count="358"/>
  </office:meta>
</office:document-meta>
</file>