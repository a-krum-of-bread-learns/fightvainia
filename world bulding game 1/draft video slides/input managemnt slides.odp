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35000002255A16F405.png" manifest:media-type="image/png"/>
  <manifest:file-entry manifest:full-path="Pictures/10000001000002B0000000834C314D92.png" manifest:media-type="image/png"/>
  <manifest:file-entry manifest:full-path="Pictures/1000000100000262000001E4E9C6D9AB.png" manifest:media-type="image/png"/>
  <manifest:file-entry manifest:full-path="Pictures/1000000000000088000000862D9EE71B.png" manifest:media-type="image/png"/>
  <manifest:file-entry manifest:full-path="Pictures/10000001000000880000008661922319.png" manifest:media-type="image/png"/>
  <manifest:file-entry manifest:full-path="Pictures/10000000000001790000016A6B543D83.png" manifest:media-type="image/png"/>
  <manifest:file-entry manifest:full-path="Pictures/1000000000000069000000670C489800.png" manifest:media-type="image/png"/>
  <manifest:file-entry manifest:full-path="Pictures/100000000000006900000067659E7CB6.png" manifest:media-type="image/png"/>
  <manifest:file-entry manifest:full-path="Pictures/100000010000006E0000006B63B5DD22.png" manifest:media-type="image/png"/>
  <manifest:file-entry manifest:full-path="Pictures/100000000000006E0000006BB829D614.png" manifest:media-type="image/png"/>
  <manifest:file-entry manifest:full-path="Pictures/10000000000000880000008680787181.png" manifest:media-type="image/png"/>
  <manifest:file-entry manifest:full-path="Pictures/100000000000006E0000006B0DF23044.png" manifest:media-type="image/png"/>
  <manifest:file-entry manifest:full-path="Pictures/1000000100000069000000671914F530.png" manifest:media-type="image/png"/>
  <manifest:file-entry manifest:full-path="Pictures/100000010000006900000067CF3F894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svg:stroke-color="#333333" draw:fill="solid" draw:fill-color="#ffffff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>
      <style:graphic-properties loext:decorative="false"/>
    </style:style>
    <style:style style:name="gr6" style:family="graphic" style:parent-style-name="Object_20_with_20_no_20_fill_20_and_20_no_20_line">
      <style:graphic-properties draw:stroke="none" draw:fill="solid" draw:fill-color="#ffffff" draw:opacity="0%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.614cm" fo:min-width="1.069cm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0.553cm" fo:min-width="0.707cm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0.96cm" fo:min-width="0.317cm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0.796cm" fo:min-width="0.419cm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0.609cm" fo:min-width="0.791cm" loext:decorative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0.945cm" fo:min-width="0.695cm" fo:wrap-option="wrap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2.178cm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118cm" fo:min-width="0cm" loext:decorative="false"/>
    </style:style>
    <style:style style:name="gr15" style:family="graphic">
      <style:graphic-properties style:writing-mode="lr-tb" loext:decorative="false"/>
    </style:style>
    <style:style style:name="gr16" style:family="graphic" style:parent-style-name="standard">
      <style:graphic-properties draw:textarea-horizontal-align="justify" draw:textarea-vertical-align="middle" draw:auto-grow-height="false" fo:min-height="0.238cm" fo:min-width="2.459cm" loext:decorative="false"/>
    </style:style>
    <style:style style:name="gr17" style:family="graphic" style:parent-style-name="standard">
      <style:graphic-properties draw:textarea-horizontal-align="justify" draw:textarea-vertical-align="middle" draw:auto-grow-height="false" fo:min-height="0.202cm" fo:min-width="2.475cm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08cm" fo:min-width="0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887cm" fo:min-width="0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908cm" fo:min-width="0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73cm" fo:min-width="0cm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561cm" fo:min-width="0.751cm" style:protect="size" loext:decorative="false"/>
    </style:style>
    <style:style style:name="gr23" style:family="graphic" style:parent-style-name="standard">
      <style:graphic-properties draw:textarea-horizontal-align="justify" draw:textarea-vertical-align="middle" draw:auto-grow-height="false" fo:min-height="0.584cm" fo:min-width="0.75cm" style:protect="size" loext:decorative="false"/>
    </style:style>
    <style:style style:name="gr24" style:family="graphic" style:parent-style-name="standard">
      <style:graphic-properties draw:textarea-horizontal-align="justify" draw:textarea-vertical-align="middle" draw:auto-grow-height="false" fo:min-height="3.524cm" fo:min-width="3.274cm" style:protect="size" loext:decorative="false"/>
    </style:style>
    <style:style style:name="gr25" style:family="graphic" style:parent-style-name="standard">
      <style:graphic-properties draw:fill="none" draw:fill-color="#000000" loext:fill-use-slide-background="false" draw:textarea-horizontal-align="justify" draw:textarea-vertical-align="middle" draw:auto-grow-height="false" fo:min-height="3.524cm" fo:min-width="3.274cm" style:protect="size" loext:decorative="false"/>
    </style:style>
    <style:style style:name="gr26" style:family="graphic" style:parent-style-name="standard">
      <style:graphic-properties draw:textarea-horizontal-align="justify" draw:textarea-vertical-align="middle" draw:auto-grow-height="false" fo:min-height="1.518cm" fo:min-width="1.268cm" loext:decorative="fals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in-height="3.556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4.267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32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33" style:family="graphic" style:parent-style-name="standard">
      <style:graphic-properties svg:stroke-color="#18a303" draw:fill="none" loext:fill-use-slide-background="false" draw:opacity="100%" draw:textarea-horizontal-align="justify" draw:textarea-vertical-align="middle" draw:auto-grow-height="false" fo:min-height="3.71cm" fo:min-width="1.768cm" loext:decorative="false"/>
    </style:style>
    <style:style style:name="gr34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2.072cm" fo:min-width="2.038cm" draw:shadow-opacity="50%" loext:decorative="false"/>
    </style:style>
    <style:style style:name="gr35" style:family="graphic" style:parent-style-name="objectwithoutfill">
      <style:graphic-properties svg:stroke-width="0.5cm" svg:stroke-color="#106802" draw:marker-start-width="0.95cm" draw:marker-end-width="0.95cm" draw:fill="solid" draw:fill-color="#106802" draw:textarea-vertical-align="middle" fo:padding-top="0.375cm" fo:padding-bottom="0.375cm" fo:padding-left="0.5cm" fo:padding-right="0.5cm" loext:decorative="false"/>
    </style:style>
    <style:style style:name="gr36" style:family="graphic" style:parent-style-name="standard">
      <style:graphic-properties svg:stroke-width="0cm" draw:marker-start-width="0.2cm" draw:marker-end-width="0.2cm" draw:textarea-horizontal-align="justify" draw:textarea-vertical-align="middle" draw:auto-grow-height="false" fo:min-height="0.614cm" fo:min-width="1.069cm" fo:padding-top="0.125cm" fo:padding-bottom="0.125cm" fo:padding-left="0.25cm" fo:padding-right="0.25cm" loext:decorative="false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736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67cm" loext:decorative="false"/>
      <style:paragraph-properties style:writing-mode="lr-tb"/>
    </style:style>
    <style:style style:name="gr39" style:family="graphic" style:parent-style-name="standard">
      <style:graphic-properties draw:fill="solid" draw:fill-color="#ffffff" draw:textarea-horizontal-align="justify" draw:textarea-vertical-align="middle" draw:auto-grow-height="false" fo:min-height="0.614cm" fo:min-width="15.503cm" loext:decorative="false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736cm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736cm" loext:decorative="false"/>
      <style:paragraph-properties style:writing-mode="lr-tb"/>
    </style:style>
    <style:style style:name="gr42" style:family="graphic" style:parent-style-name="standard">
      <style:graphic-properties svg:stroke-color="#18a303" draw:fill="none" loext:fill-use-slide-background="false" draw:opacity="100%" draw:textarea-horizontal-align="justify" draw:textarea-vertical-align="middle" draw:auto-grow-height="false" fo:min-height="3.71cm" fo:min-width="6.259cm" loext:decorative="false"/>
    </style:style>
    <style:style style:name="gr43" style:family="graphic" style:parent-style-name="standard">
      <style:graphic-properties svg:stroke-color="#18a303" draw:fill="none" loext:fill-use-slide-background="false" draw:opacity="100%" draw:textarea-horizontal-align="justify" draw:textarea-vertical-align="middle" draw:auto-grow-height="false" fo:min-height="3.71cm" fo:min-width="7.094cm" loext:decorative="false"/>
    </style:style>
    <style:style style:name="gr44" style:family="graphic" style:parent-style-name="standard">
      <style:graphic-properties svg:stroke-color="#1c99e0" draw:fill="none" loext:fill-use-slide-background="false" draw:opacity="100%" draw:textarea-horizontal-align="justify" draw:textarea-vertical-align="middle" draw:auto-grow-height="false" fo:min-height="5.506cm" fo:min-width="12.945cm" loext:decorative="fals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797cm" loext:decorative="false"/>
      <style:paragraph-properties style:writing-mode="lr-tb"/>
    </style:style>
    <style:style style:name="gr46" style:family="graphic" style:parent-style-name="standard">
      <style:graphic-properties svg:stroke-color="#18a303" draw:fill="none" loext:fill-use-slide-background="false" draw:opacity="100%" draw:textarea-horizontal-align="justify" draw:textarea-vertical-align="middle" draw:auto-grow-height="false" fo:min-height="5.506cm" fo:min-width="7.813cm" loext:decorative="false"/>
    </style:style>
    <style:style style:name="gr47" style:family="graphic" style:parent-style-name="standard">
      <style:graphic-properties draw:textarea-horizontal-align="justify" draw:textarea-vertical-align="middle" draw:auto-grow-height="false" fo:min-height="0.046cm" fo:min-width="0cm" loext:decorative="false"/>
    </style:style>
    <style:style style:name="gr48" style:family="graphic" style:parent-style-name="standard">
      <style:graphic-properties draw:textarea-horizontal-align="justify" draw:textarea-vertical-align="middle" draw:auto-grow-height="false" fo:min-height="2.475cm" fo:min-width="3.257cm" style:writing-mode="lr-tb" loext:decorative="false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1.977cm" fo:min-width="1.84cm" loext:decorative="false"/>
    </style:style>
    <style:style style:name="gr50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51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cm" fo:min-width="0.984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cm" fo:min-width="1.966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2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3.473cm" loext:decorative="false"/>
      <style:paragraph-properties style:writing-mode="lr-tb"/>
    </style:style>
    <style:style style:name="pr5" style:family="presentation" style:parent-style-name="Default-title">
      <style:graphic-properties fo:min-height="2.629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 draw:fill-color="#ffffff" draw:opacity="100%"/>
      <style:paragraph-properties fo:text-align="center"/>
    </style:style>
    <style:style style:name="P5" style:family="paragraph">
      <loext:graphic-properties draw:fill="solid" draw:fill-color="#ffffff" draw:opacity="0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text-align="center" style:writing-mode="lr-tb"/>
      <style:text-properties fo:font-size="18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="none" draw:fill-color="#ffffff"/>
      <style:text-properties fo:font-size="50pt" style:font-size-asian="50pt" style:font-size-complex="50pt"/>
    </style:style>
    <style:style style:name="P11" style:family="paragraph">
      <loext:graphic-properties draw:fill="none" draw:fill-color="#000000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</style:style>
    <style:style style:name="P15" style:family="paragraph">
      <loext:graphic-properties draw:fill="none" draw:opacity="100%"/>
      <style:paragraph-properties fo:text-align="center"/>
    </style:style>
    <style:style style:name="P16" style:family="paragraph">
      <loext:graphic-properties draw:fill="solid" draw:fill-color="#ffffff" draw:opacity="50%"/>
      <style:paragraph-properties fo:text-align="center"/>
    </style:style>
    <style:style style:name="P17" style:family="paragraph">
      <loext:graphic-properties draw:fill="solid" draw:fill-color="#106802"/>
      <style:paragraph-properties fo:text-align="center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P19" style:family="paragraph">
      <loext:graphic-properties draw:fill="none"/>
      <style:text-properties fo:font-size="18pt"/>
    </style:style>
    <style:style style:name="P20" style:family="paragraph">
      <style:paragraph-properties fo:text-align="center"/>
      <style:text-properties fo:font-size="50pt" style:font-size-asian="50pt" style:font-size-complex="50pt"/>
    </style:style>
    <style:style style:name="P21" style:family="paragraph">
      <style:paragraph-properties fo:text-align="center" style:writing-mode="lr-tb"/>
      <style:text-properties fo:font-size="50pt" style:font-size-asian="50pt" style:font-size-complex="50pt"/>
    </style:style>
    <style:style style:name="P22" style:family="paragraph">
      <style:paragraph-properties fo:text-align="center" style:writing-mode="lr-tb"/>
    </style:style>
    <style:style style:name="T1" style:family="text">
      <style:text-properties fo:font-size="18pt"/>
    </style:style>
    <style:style style:name="T2" style:family="text">
      <style:text-properties fo:font-size="50pt" style:font-size-asian="50pt" style:font-size-complex="5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8.202cm" svg:height="3.465cm" svg:x="4.904cm" svg:y="4.713cm">
          <draw:image xlink:href="Pictures/10000001000002B0000000834C314D9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Managing <text:s/>inputs</text:p>
          </draw:text-box>
        </draw:frame>
        <draw:frame draw:style-name="gr1" draw:text-style-name="P1" draw:layer="layout" svg:width="5.639cm" svg:height="4.474cm" svg:x="0.516cm" svg:y="4.001cm">
          <draw:image xlink:href="Pictures/1000000100000262000001E4E9C6D9A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.909cm" svg:height="2.83cm" svg:x="2.736cm" svg:y="6.629cm">
          <draw:image xlink:href="Pictures/100000000000006E0000006B0DF23044.png" xlink:type="simple" xlink:show="embed" xlink:actuate="onLoad" draw:mime-type="image/png">
            <text:p/>
          </draw:image>
        </draw:frame>
        <draw:frame draw:style-name="gr3" draw:text-style-name="P3" draw:layer="layout" svg:width="2.777cm" svg:height="2.724cm" svg:x="6.142cm" svg:y="9.761cm">
          <draw:image xlink:href="Pictures/100000000000006900000067659E7CB6.png" xlink:type="simple" xlink:show="embed" xlink:actuate="onLoad" draw:mime-type="image/png">
            <text:p/>
          </draw:image>
        </draw:frame>
        <draw:frame draw:style-name="gr3" draw:text-style-name="P3" draw:layer="layout" svg:width="2.777cm" svg:height="2.724cm" svg:x="6.182cm" svg:y="3.598cm">
          <draw:image xlink:href="Pictures/1000000000000069000000670C489800.png" xlink:type="simple" xlink:show="embed" xlink:actuate="onLoad" draw:mime-type="image/png">
            <text:p/>
          </draw:image>
        </draw:frame>
        <draw:frame draw:style-name="gr3" draw:text-style-name="P3" draw:layer="layout" svg:width="2.534cm" svg:height="2.497cm" svg:x="9.705cm" svg:y="6.669cm">
          <draw:image xlink:href="Pictures/1000000000000088000000862D9EE71B.png" xlink:type="simple" xlink:show="embed" xlink:actuate="onLoad" draw:mime-type="image/png">
            <text:p/>
          </draw:image>
        </draw:frame>
        <draw:frame draw:style-name="gr3" draw:text-style-name="P3" draw:layer="layout" svg:width="9.974cm" svg:height="9.577cm" svg:x="16.051cm" svg:y="3.703cm">
          <draw:image xlink:href="Pictures/10000000000001790000016A6B543D83.png" xlink:type="simple" xlink:show="embed" xlink:actuate="onLoad" draw:mime-type="image/png">
            <text:p/>
          </draw:image>
        </draw:frame>
        <draw:frame draw:style-name="gr4" draw:text-style-name="P4" draw:layer="layout" svg:width="2.909cm" svg:height="2.83cm" svg:x="2.627cm" svg:y="3.436cm">
          <draw:image xlink:href="Pictures/100000000000006E0000006BB829D614.png" xlink:type="simple" xlink:show="embed" xlink:actuate="onLoad" draw:mime-type="image/png">
            <text:p/>
          </draw:image>
        </draw:frame>
        <draw:frame draw:style-name="gr3" draw:text-style-name="P3" draw:layer="layout" svg:width="2.534cm" svg:height="2.497cm" svg:x="9.513cm" svg:y="9.794cm">
          <draw:image xlink:href="Pictures/10000000000000880000008680787181.png" xlink:type="simple" xlink:show="embed" xlink:actuate="onLoad" draw:mime-type="image/png">
            <text:p/>
          </draw:image>
        </draw:frame>
        <draw:g draw:style-name="gr5">
          <draw:frame draw:style-name="gr6" draw:text-style-name="P5" draw:layer="layout" svg:width="2.909cm" svg:height="2.83cm" svg:x="2.847cm" svg:y="9.577cm">
            <draw:image xlink:href="Pictures/100000010000006E0000006B63B5DD22.png" xlink:type="simple" xlink:show="embed" xlink:actuate="onLoad" draw:mime-type="image/png">
              <text:p/>
            </draw:image>
          </draw:frame>
          <draw:frame draw:style-name="gr6" draw:text-style-name="P5" draw:layer="layout" svg:width="2.777cm" svg:height="2.724cm" svg:x="2.979cm" svg:y="9.683cm">
            <draw:image xlink:href="Pictures/100000010000006900000067CF3F8940.png" xlink:type="simple" xlink:show="embed" xlink:actuate="onLoad" draw:mime-type="image/png">
              <text:p/>
            </draw:image>
          </draw:frame>
        </draw:g>
        <draw:g draw:style-name="gr5">
          <draw:frame draw:style-name="gr6" draw:text-style-name="P5" draw:layer="layout" svg:width="2.546cm" svg:height="2.497cm" svg:x="9.452cm" svg:y="3.589cm">
            <draw:image xlink:href="Pictures/1000000100000069000000671914F530.png" xlink:type="simple" xlink:show="embed" xlink:actuate="onLoad" draw:mime-type="image/png">
              <text:p/>
            </draw:image>
          </draw:frame>
          <draw:frame draw:style-name="gr6" draw:text-style-name="P5" draw:layer="layout" svg:width="2.534cm" svg:height="2.497cm" svg:x="9.452cm" svg:y="3.589cm">
            <draw:image xlink:href="Pictures/10000001000000880000008661922319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7" draw:text-style-name="P6" draw:layer="layout" svg:width="2.019cm" svg:height="1.932cm" svg:x="7.763cm" svg:y="5.361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8" draw:text-style-name="P6" draw:layer="layout" svg:width="1.566cm" svg:height="1.741cm" svg:x="1.532cm" svg:y="5.587cm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6" draw:layer="layout" svg:width="1.619cm" svg:height="1.618cm" svg:x="4.717cm" svg:y="8.27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10" draw:text-style-name="P6" draw:layer="layout" svg:width="1.881cm" svg:height="1.376cm" svg:x="4.681cm" svg:y="3.098cm">
          <text:p/>
          <draw:enhanced-geometry svg:viewBox="0 0 21600 21600" draw:mirror-horizontal="false" draw:mirror-vertical="false" draw:text-areas="?f0 ?f7 ?f2 21600" draw:type="up-arrow" draw:modifiers="10650.9803921569 5531.265716680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-2.40942703237817) translate (9.502cm 4.336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8" draw:text-style-name="P6" draw:layer="layout" svg:width="1.566cm" svg:height="1.741cm" draw:transform="rotate (2.42949831877611) translate (8.448cm 10.413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8" draw:text-style-name="P6" draw:layer="layout" svg:width="1.566cm" svg:height="1.741cm" draw:transform="rotate (0.776322451287078) translate (1.356cm 8.945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1" draw:text-style-name="P6" draw:layer="layout" svg:width="1.675cm" svg:height="1.861cm" draw:transform="skewX (-0.00209439510239321) rotate (-0.808261976598574) translate (3.01cm 3.185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8" draw:layer="layout" svg:width="1.689cm" svg:height="1.689cm" svg:x="4.665cm" svg:y="5.466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layout" svg:width="9.796cm" svg:height="2.428cm" svg:x="2.143cm" svg:y="0.48cm">
          <draw:text-box>
            <text:p><text:span text:style-name="T1">E</text:span><text:span text:style-name="T1">ac</text:span><text:span text:style-name="T1">h </text:span><text:span text:style-name="T1">in</text:span><text:span text:style-name="T1">p</text:span><text:span text:style-name="T1">ut </text:span><text:span text:style-name="T1">o</text:span><text:span text:style-name="T1">n</text:span><text:span text:style-name="T1">e </text:span><text:span text:style-name="T1">at </text:span><text:span text:style-name="T1">a </text:span><text:span text:style-name="T1">ti</text:span><text:span text:style-name="T1">m</text:span><text:span text:style-name="T1">e </text:span><text:span text:style-name="T1">sh</text:span><text:span text:style-name="T1">o</text:span><text:span text:style-name="T1">w</text:span><text:span text:style-name="T1">n </text:span><text:span text:style-name="T1">w</text:span><text:span text:style-name="T1">h</text:span><text:span text:style-name="T1">e</text:span><text:span text:style-name="T1">n i </text:span><text:span text:style-name="T1">sp</text:span><text:span text:style-name="T1">e</text:span><text:span text:style-name="T1">ak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custom-shape draw:style-name="gr7" draw:text-style-name="P6" draw:layer="layout" svg:width="2.019cm" svg:height="1.932cm" svg:x="7.763cm" svg:y="5.361cm">
          <text:p/>
          <draw:enhanced-geometry svg:viewBox="0 0 21600 21600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6" draw:layer="layout" svg:width="1.881cm" svg:height="1.376cm" svg:x="1.722cm" svg:y="5.552cm">
          <text:p/>
          <draw:enhanced-geometry svg:viewBox="0 0 21600 21600" draw:text-areas="?f0 ?f7 ?f2 21600" draw:type="up-arrow" draw:modifiers="10650.9803921569 5531.265716680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-2.40942703237817) translate (17.614cm 6.617cm)">
          <text:p/>
          <draw:enhanced-geometry svg:viewBox="0 0 21600 21600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4" draw:text-style-name="P6" draw:layer="layout" svg:width="2.315cm" svg:height="2.298cm" svg:x="4.56cm" svg:y="5.1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075.5426917510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g draw:style-name="gr15">
          <draw:custom-shape draw:style-name="gr16" draw:text-style-name="P6" draw:layer="layout" svg:width="2.959cm" svg:height="0.488cm" svg:x="10.932cm" svg:y="5.74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6" draw:layer="layout" svg:width="2.975cm" svg:height="0.452cm" svg:x="10.933cm" svg:y="6.737cm">
            <text:p/>
            <draw:enhanced-geometry svg:viewBox="0 0 21600 21600" draw:type="rectangle" draw:enhanced-path="M 0 0 L 21600 0 21600 21600 0 21600 0 0 Z N"/>
          </draw:custom-shape>
        </draw:g>
        <draw:custom-shape draw:style-name="gr7" draw:text-style-name="P6" draw:layer="layout" svg:width="2.019cm" svg:height="1.932cm" draw:transform="rotate (-1.55247036964896) translate (9.755cm 2.168cm)">
          <text:p/>
          <draw:enhanced-geometry svg:viewBox="0 0 21600 21600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6" draw:layer="layout" svg:width="1.881cm" svg:height="1.376cm" svg:x="1.757cm" svg:y="2.419cm">
          <text:p/>
          <draw:enhanced-geometry svg:viewBox="0 0 21600 21600" draw:text-areas="?f0 ?f7 ?f2 21600" draw:type="up-arrow" draw:modifiers="10650.9803921569 5531.265716680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14" draw:text-style-name="P6" draw:layer="layout" svg:width="2.315cm" svg:height="2.298cm" svg:x="4.595cm" svg:y="1.96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075.5426917510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g draw:style-name="gr15">
          <draw:custom-shape draw:style-name="gr16" draw:text-style-name="P6" draw:layer="layout" svg:width="2.959cm" svg:height="0.488cm" svg:x="10.967cm" svg:y="2.612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6" draw:layer="layout" svg:width="2.975cm" svg:height="0.452cm" svg:x="10.968cm" svg:y="3.604cm">
            <text:p/>
            <draw:enhanced-geometry svg:viewBox="0 0 21600 21600" draw:type="rectangle" draw:enhanced-path="M 0 0 L 21600 0 21600 21600 0 21600 0 0 Z N"/>
          </draw:custom-shape>
        </draw:g>
        <draw:custom-shape draw:style-name="gr12" draw:text-style-name="P8" draw:layer="layout" svg:width="1.689cm" svg:height="1.689cm" svg:x="15.614cm" svg:y="2.629cm">
          <text:p text:style-name="P7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custom-shape draw:style-name="gr7" draw:text-style-name="P6" draw:layer="layout" svg:width="2.019cm" svg:height="1.932cm" svg:x="7.746cm" svg:y="3.865cm">
          <text:p/>
          <draw:enhanced-geometry svg:viewBox="0 0 21600 21600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6" draw:layer="layout" svg:width="1.881cm" svg:height="1.376cm" svg:x="1.705cm" svg:y="4.056cm">
          <text:p/>
          <draw:enhanced-geometry svg:viewBox="0 0 21600 21600" draw:text-areas="?f0 ?f7 ?f2 21600" draw:type="up-arrow" draw:modifiers="10650.9803921569 5531.265716680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14" draw:text-style-name="P6" draw:layer="layout" svg:width="2.315cm" svg:height="2.298cm" svg:x="4.543cm" svg:y="3.60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075.5426917510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draw:layer="layout" svg:width="2.019cm" svg:height="1.932cm" svg:x="21.533cm" svg:y="4.457cm">
          <text:p/>
          <draw:enhanced-geometry svg:viewBox="0 0 21600 21600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g draw:style-name="gr15">
          <draw:custom-shape draw:style-name="gr16" draw:text-style-name="P6" draw:layer="layout" svg:width="2.959cm" svg:height="0.488cm" svg:x="17.669cm" svg:y="4.54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6" draw:layer="layout" svg:width="2.975cm" svg:height="0.452cm" svg:x="17.67cm" svg:y="5.537cm">
            <text:p/>
            <draw:enhanced-geometry svg:viewBox="0 0 21600 21600" draw:type="rectangle" draw:enhanced-path="M 0 0 L 21600 0 21600 21600 0 21600 0 0 Z N"/>
          </draw:custom-shape>
        </draw:g>
        <draw:custom-shape draw:style-name="gr7" draw:text-style-name="P6" draw:layer="layout" svg:width="2.019cm" svg:height="1.932cm" draw:transform="rotate (-1.55247036964896) translate (15.987cm 3.927cm)">
          <text:p/>
          <draw:enhanced-geometry svg:viewBox="0 0 21600 21600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4" draw:text-style-name="P6" draw:layer="layout" svg:width="2.315cm" svg:height="2.298cm" svg:x="10.827cm" svg:y="3.72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075.5426917510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draw:layer="layout" svg:width="2.019cm" svg:height="1.932cm" svg:x="7.659cm" svg:y="11.89cm">
          <text:p/>
          <draw:enhanced-geometry svg:viewBox="0 0 21600 21600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6" draw:layer="layout" svg:width="1.881cm" svg:height="1.376cm" svg:x="1.618cm" svg:y="12.081cm">
          <text:p/>
          <draw:enhanced-geometry svg:viewBox="0 0 21600 21600" draw:text-areas="?f0 ?f7 ?f2 21600" draw:type="up-arrow" draw:modifiers="10650.9803921569 5531.265716680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14" draw:text-style-name="P6" draw:layer="layout" svg:width="2.315cm" svg:height="2.298cm" svg:x="4.456cm" svg:y="11.6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075.5426917510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g draw:style-name="gr15">
          <draw:custom-shape draw:style-name="gr16" draw:text-style-name="P6" draw:layer="layout" svg:width="2.959cm" svg:height="0.488cm" svg:x="21.673cm" svg:y="12.779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6" draw:layer="layout" svg:width="2.975cm" svg:height="0.452cm" svg:x="21.674cm" svg:y="13.771cm">
            <text:p/>
            <draw:enhanced-geometry svg:viewBox="0 0 21600 21600" draw:type="rectangle" draw:enhanced-path="M 0 0 L 21600 0 21600 21600 0 21600 0 0 Z N"/>
          </draw:custom-shape>
        </draw:g>
        <draw:custom-shape draw:style-name="gr7" draw:text-style-name="P6" draw:layer="layout" svg:width="2.019cm" svg:height="1.932cm" draw:transform="rotate (-1.55247036964896) translate (15.9cm 11.952cm)">
          <text:p/>
          <draw:enhanced-geometry svg:viewBox="0 0 21600 21600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4" draw:text-style-name="P6" draw:layer="layout" svg:width="2.315cm" svg:height="2.298cm" svg:x="10.74cm" svg:y="11.75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075.5426917510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4" draw:text-style-name="P6" draw:layer="layout" svg:width="2.315cm" svg:height="2.298cm" svg:x="16.329cm" svg:y="11.89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075.5426917510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6" draw:layer="layout" svg:width="1.566cm" svg:height="1.741cm" svg:x="19.252cm" svg:y="12.326cm">
          <text:p/>
          <draw:enhanced-geometry svg:viewBox="0 0 21600 21600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8" draw:layer="layout" svg:width="1.689cm" svg:height="1.689cm" svg:x="25.589cm" svg:y="12.832cm">
          <text:p text:style-name="P7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To do this in code 2 ways</text:p>
          </draw:text-box>
        </draw:frame>
        <draw:frame draw:style-name="gr1" draw:text-style-name="P1" draw:layer="layout" svg:width="8.895cm" svg:height="7.057cm" svg:x="15.87cm" svg:y="4.165cm">
          <draw:image xlink:href="Pictures/1000000100000262000001E4E9C6D9AB.png" xlink:type="simple" xlink:show="embed" xlink:actuate="onLoad" draw:mime-type="image/png">
            <text:p/>
          </draw:image>
        </draw:frame>
        <draw:frame draw:style-name="gr1" draw:text-style-name="P1" draw:layer="layout" svg:width="10.557cm" svg:height="7.06cm" svg:x="1.441cm" svg:y="4.255cm">
          <draw:image xlink:href="Pictures/1000000100000335000002255A16F40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custom-shape draw:style-name="gr7" draw:text-style-name="P6" draw:layer="layout" svg:width="2.019cm" svg:height="1.932cm" svg:x="7.763cm" svg:y="5.361cm">
          <text:p/>
          <draw:enhanced-geometry svg:viewBox="0 0 21600 21600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8" draw:text-style-name="P6" draw:layer="layout" svg:width="1.566cm" svg:height="1.741cm" svg:x="1.532cm" svg:y="5.587cm">
          <text:p/>
          <draw:enhanced-geometry svg:viewBox="0 0 21600 21600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6" draw:layer="layout" svg:width="1.619cm" svg:height="1.618cm" svg:x="4.717cm" svg:y="8.27cm">
          <text:p/>
          <draw:enhanced-geometry svg:viewBox="0 0 21600 21600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10" draw:text-style-name="P6" draw:layer="layout" svg:width="1.881cm" svg:height="1.376cm" svg:x="4.681cm" svg:y="3.098cm">
          <text:p/>
          <draw:enhanced-geometry svg:viewBox="0 0 21600 21600" draw:text-areas="?f0 ?f7 ?f2 21600" draw:type="up-arrow" draw:modifiers="10650.9803921569 5531.265716680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-2.40942703237817) translate (9.502cm 4.336cm)">
          <text:p/>
          <draw:enhanced-geometry svg:viewBox="0 0 21600 21600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8" draw:text-style-name="P6" draw:layer="layout" svg:width="1.566cm" svg:height="1.741cm" draw:transform="rotate (2.42949831877611) translate (8.448cm 10.413cm)">
          <text:p/>
          <draw:enhanced-geometry svg:viewBox="0 0 21600 21600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8" draw:text-style-name="P6" draw:layer="layout" svg:width="1.566cm" svg:height="1.741cm" draw:transform="rotate (0.776322451287078) translate (1.356cm 8.945cm)">
          <text:p/>
          <draw:enhanced-geometry svg:viewBox="0 0 21600 21600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8" draw:text-style-name="P6" draw:layer="layout" svg:width="1.566cm" svg:height="1.741cm" draw:transform="rotate (-0.807389311972577) translate (2.925cm 3.185cm)">
          <text:p/>
          <draw:enhanced-geometry svg:viewBox="0 0 21600 21600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8" draw:layer="layout" svg:width="1.689cm" svg:height="1.689cm" svg:x="4.665cm" svg:y="5.466cm">
          <text:p text:style-name="P7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0" draw:layer="layout" svg:width="6.057cm" svg:height="6.458cm" svg:x="11.036cm" svg:y="3.429cm">
          <draw:text-box>
            <text:p><text:span text:style-name="T2">7 <text:s/>8 <text:s/>9</text:span></text:p>
            <text:p><text:span text:style-name="T2">4 <text:s/>5 <text:s/>6</text:span></text:p>
            <text:p><text:span text:style-name="T2">1 <text:s/>2 <text:s/>3</text:span></text:p>
          </draw:text-box>
        </draw:frame>
        <draw:frame draw:style-name="gr19" draw:text-style-name="P10" draw:layer="layout" svg:width="9.503cm" svg:height="7.137cm" svg:x="18.382cm" svg:y="3.533cm">
          <draw:text-box>
            <text:p><text:span text:style-name="T2">UL <text:s/>U <text:s text:c="2"/>UR</text:span></text:p>
            <text:p><text:span text:style-name="T2">L <text:s text:c="4"/>N <text:s text:c="4"/>R</text:span></text:p>
            <text:p><text:span text:style-name="T2">DL <text:s/>D <text:s text:c="2"/>D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20" draw:text-style-name="P10" draw:layer="layout" svg:width="8.843cm" svg:height="6.158cm" svg:x="9.579cm" svg:y="4.796cm">
          <draw:text-box>
            <text:p><text:span text:style-name="T2"><text:s text:c="6"/>18 <text:s/></text:span></text:p>
            <text:p><text:span text:style-name="T2">14 <text:s text:c="6"/>16</text:span></text:p>
            <text:p><text:span text:style-name="T2"><text:s text:c="6"/>12 <text:s/></text:span></text:p>
          </draw:text-box>
        </draw:frame>
        <draw:frame draw:style-name="gr21" draw:text-style-name="P10" draw:layer="layout" svg:width="8.804cm" svg:height="6.523cm" svg:x="18.6cm" svg:y="5.006cm">
          <draw:text-box>
            <text:p><text:span text:style-name="T2"><text:s text:c="6"/>HP </text:span></text:p>
            <text:p><text:span text:style-name="T2">LP <text:s text:c="6"/>HK</text:span></text:p>
            <text:p><text:span text:style-name="T2"><text:s text:c="6"/>LK </text:span></text:p>
          </draw:text-box>
        </draw:frame>
        <draw:frame draw:style-name="gr3" draw:text-style-name="P3" draw:layer="layout" svg:width="2.909cm" svg:height="2.83cm" svg:x="0.404cm" svg:y="6.516cm">
          <draw:image xlink:href="Pictures/100000000000006E0000006B0DF23044.png" xlink:type="simple" xlink:show="embed" xlink:actuate="onLoad" draw:mime-type="image/png">
            <text:p/>
          </draw:image>
        </draw:frame>
        <draw:frame draw:style-name="gr3" draw:text-style-name="P3" draw:layer="layout" svg:width="2.777cm" svg:height="2.724cm" svg:x="3.119cm" svg:y="9.057cm">
          <draw:image xlink:href="Pictures/100000000000006900000067659E7CB6.png" xlink:type="simple" xlink:show="embed" xlink:actuate="onLoad" draw:mime-type="image/png">
            <text:p/>
          </draw:image>
        </draw:frame>
        <draw:frame draw:style-name="gr3" draw:text-style-name="P3" draw:layer="layout" svg:width="2.777cm" svg:height="2.724cm" svg:x="3.073cm" svg:y="4.229cm">
          <draw:image xlink:href="Pictures/1000000000000069000000670C489800.png" xlink:type="simple" xlink:show="embed" xlink:actuate="onLoad" draw:mime-type="image/png">
            <text:p/>
          </draw:image>
        </draw:frame>
        <draw:frame draw:style-name="gr3" draw:text-style-name="P3" draw:layer="layout" svg:width="2.534cm" svg:height="2.497cm" svg:x="5.553cm" svg:y="6.56cm">
          <draw:image xlink:href="Pictures/1000000000000088000000862D9EE71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Types of blocking 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Images of sf6(regular and parry),smash bro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How blocking works</text:p>
          </draw:text-box>
        </draw:frame>
        <draw:custom-shape draw:style-name="gr22" draw:text-style-name="P6" draw:layer="layout" svg:width="2.5cm" svg:height="2.5cm" draw:transform="rotate (-1.5707963267949) translate (7.767cm 3.71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6" draw:layer="layout" svg:width="2.5cm" svg:height="2.5cm" draw:transform="rotate (-1.5707963267949) translate (7.527cm 10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6" draw:layer="layout" svg:width="2.5cm" svg:height="2.5cm" draw:transform="rotate (-1.5707963267949) translate (9.654cm 7.08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24" draw:text-style-name="P6" draw:layer="layout" svg:width="6cm" svg:height="6cm" svg:x="13.12cm" svg:y="3.62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range-x-minimum="0" draw:handle-range-x-maximum="10800" draw:handle-position="$0 top" draw:handle-position-x="$0" draw:handle-position-y="top"/>
          </draw:enhanced-geometry>
        </draw:custom-shape>
        <draw:custom-shape draw:style-name="gr25" draw:text-style-name="P11" draw:layer="layout" svg:width="6cm" svg:height="6cm" svg:x="13.12cm" svg:y="7.28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To do this in code 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The subjective Projectile case </text:p>
          </draw:text-box>
        </draw:frame>
        <draw:custom-shape draw:style-name="gr24" draw:text-style-name="P6" draw:layer="layout" svg:width="6cm" svg:height="6cm" svg:x="13.12cm" svg:y="3.62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range-x-minimum="0" draw:handle-range-x-maximum="10800" draw:handle-position="$0 top" draw:handle-position-x="$0" draw:handle-position-y="top"/>
          </draw:enhanced-geometry>
        </draw:custom-shape>
        <draw:custom-shape draw:style-name="gr25" draw:text-style-name="P11" draw:layer="layout" svg:width="6cm" svg:height="6cm" svg:x="13.12cm" svg:y="7.28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6" draw:layer="layout" svg:width="2.5cm" svg:height="2.5cm" svg:x="6.56cm" svg:y="6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To do this in game engine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How to make an input manger fo fighting games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.909cm" svg:height="2.83cm" svg:x="2.736cm" svg:y="6.629cm">
          <draw:image xlink:href="Pictures/100000000000006E0000006B0DF23044.png" xlink:type="simple" xlink:show="embed" xlink:actuate="onLoad" draw:mime-type="image/png">
            <text:p/>
          </draw:image>
        </draw:frame>
        <draw:frame draw:style-name="gr3" draw:text-style-name="P3" draw:layer="layout" svg:width="2.777cm" svg:height="2.724cm" svg:x="6.142cm" svg:y="9.761cm">
          <draw:image xlink:href="Pictures/100000000000006900000067659E7CB6.png" xlink:type="simple" xlink:show="embed" xlink:actuate="onLoad" draw:mime-type="image/png">
            <text:p/>
          </draw:image>
        </draw:frame>
        <draw:frame draw:style-name="gr3" draw:text-style-name="P3" draw:layer="layout" svg:width="2.777cm" svg:height="2.724cm" svg:x="6.182cm" svg:y="3.598cm">
          <draw:image xlink:href="Pictures/1000000000000069000000670C489800.png" xlink:type="simple" xlink:show="embed" xlink:actuate="onLoad" draw:mime-type="image/png">
            <text:p/>
          </draw:image>
        </draw:frame>
        <draw:frame draw:style-name="gr3" draw:text-style-name="P3" draw:layer="layout" svg:width="2.534cm" svg:height="2.497cm" svg:x="9.705cm" svg:y="6.669cm">
          <draw:image xlink:href="Pictures/1000000000000088000000862D9EE71B.png" xlink:type="simple" xlink:show="embed" xlink:actuate="onLoad" draw:mime-type="image/png">
            <text:p/>
          </draw:image>
        </draw:frame>
        <draw:frame draw:style-name="gr3" draw:text-style-name="P3" draw:layer="layout" svg:width="9.974cm" svg:height="9.577cm" svg:x="16.051cm" svg:y="3.703cm">
          <draw:image xlink:href="Pictures/10000000000001790000016A6B543D83.png" xlink:type="simple" xlink:show="embed" xlink:actuate="onLoad" draw:mime-type="image/png">
            <text:p/>
          </draw:image>
        </draw:frame>
        <draw:frame draw:style-name="gr4" draw:text-style-name="P4" draw:layer="layout" svg:width="2.909cm" svg:height="2.83cm" svg:x="2.627cm" svg:y="3.436cm">
          <draw:image xlink:href="Pictures/100000000000006E0000006BB829D614.png" xlink:type="simple" xlink:show="embed" xlink:actuate="onLoad" draw:mime-type="image/png">
            <text:p/>
          </draw:image>
        </draw:frame>
        <draw:frame draw:style-name="gr3" draw:text-style-name="P3" draw:layer="layout" svg:width="2.534cm" svg:height="2.497cm" svg:x="9.513cm" svg:y="9.794cm">
          <draw:image xlink:href="Pictures/10000000000000880000008680787181.png" xlink:type="simple" xlink:show="embed" xlink:actuate="onLoad" draw:mime-type="image/png">
            <text:p/>
          </draw:image>
        </draw:frame>
        <draw:g draw:style-name="gr5">
          <draw:frame draw:style-name="gr6" draw:text-style-name="P5" draw:layer="layout" svg:width="2.909cm" svg:height="2.83cm" svg:x="2.847cm" svg:y="9.577cm">
            <draw:image xlink:href="Pictures/100000010000006E0000006B63B5DD22.png" xlink:type="simple" xlink:show="embed" xlink:actuate="onLoad" draw:mime-type="image/png">
              <text:p/>
            </draw:image>
          </draw:frame>
          <draw:frame draw:style-name="gr6" draw:text-style-name="P5" draw:layer="layout" svg:width="2.777cm" svg:height="2.724cm" svg:x="2.979cm" svg:y="9.683cm">
            <draw:image xlink:href="Pictures/100000010000006900000067CF3F8940.png" xlink:type="simple" xlink:show="embed" xlink:actuate="onLoad" draw:mime-type="image/png">
              <text:p/>
            </draw:image>
          </draw:frame>
        </draw:g>
        <draw:g draw:style-name="gr5">
          <draw:frame draw:style-name="gr6" draw:text-style-name="P5" draw:layer="layout" svg:width="2.546cm" svg:height="2.497cm" svg:x="9.452cm" svg:y="3.589cm">
            <draw:image xlink:href="Pictures/1000000100000069000000671914F530.png" xlink:type="simple" xlink:show="embed" xlink:actuate="onLoad" draw:mime-type="image/png">
              <text:p/>
            </draw:image>
          </draw:frame>
          <draw:frame draw:style-name="gr6" draw:text-style-name="P5" draw:layer="layout" svg:width="2.534cm" svg:height="2.497cm" svg:x="9.452cm" svg:y="3.589cm">
            <draw:image xlink:href="Pictures/10000001000000880000008661922319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custom-shape draw:style-name="gr7" draw:text-style-name="P6" draw:layer="layout" svg:width="2.019cm" svg:height="1.932cm" svg:x="7.763cm" svg:y="5.361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8" draw:text-style-name="P6" draw:layer="layout" svg:width="1.566cm" svg:height="1.741cm" svg:x="1.532cm" svg:y="5.587cm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6" draw:layer="layout" svg:width="1.619cm" svg:height="1.618cm" svg:x="4.717cm" svg:y="8.27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10" draw:text-style-name="P6" draw:layer="layout" svg:width="1.881cm" svg:height="1.376cm" svg:x="4.681cm" svg:y="3.098cm">
          <text:p/>
          <draw:enhanced-geometry svg:viewBox="0 0 21600 21600" draw:mirror-horizontal="false" draw:mirror-vertical="false" draw:text-areas="?f0 ?f7 ?f2 21600" draw:type="up-arrow" draw:modifiers="10650.9803921569 5531.265716680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-2.40942703237817) translate (9.502cm 4.336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8" draw:text-style-name="P6" draw:layer="layout" svg:width="1.566cm" svg:height="1.741cm" draw:transform="rotate (2.42949831877611) translate (8.448cm 10.413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8" draw:text-style-name="P6" draw:layer="layout" svg:width="1.566cm" svg:height="1.741cm" draw:transform="rotate (0.776322451287078) translate (1.356cm 8.945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1" draw:text-style-name="P6" draw:layer="layout" svg:width="1.675cm" svg:height="1.861cm" draw:transform="skewX (-0.00209439510239321) rotate (-0.808261976598574) translate (3.01cm 3.185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8" draw:layer="layout" svg:width="1.689cm" svg:height="1.689cm" svg:x="4.665cm" svg:y="5.466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layout" svg:width="9.796cm" svg:height="2.428cm" svg:x="2.143cm" svg:y="0.48cm">
          <draw:text-box>
            <text:p><text:span text:style-name="T1">Each input one at a time shown when i speak</text:span></text:p>
          </draw:text-box>
        </draw:frame>
        <draw:custom-shape draw:style-name="gr14" draw:text-style-name="P6" draw:layer="layout" svg:width="2.315cm" svg:height="2.298cm" svg:x="10.829cm" svg:y="3.72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075.5426917510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g draw:style-name="gr15">
          <draw:custom-shape draw:style-name="gr16" draw:text-style-name="P6" draw:layer="layout" svg:width="2.959cm" svg:height="0.488cm" svg:x="11.452cm" svg:y="7.79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6" draw:layer="layout" svg:width="2.975cm" svg:height="0.452cm" svg:x="11.453cm" svg:y="8.785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custom-shape draw:style-name="gr7" draw:text-style-name="P6" draw:layer="layout" svg:width="2.019cm" svg:height="1.932cm" svg:x="7.535cm" svg:y="1.078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6" draw:layer="layout" svg:width="1.619cm" svg:height="1.618cm" svg:x="2.243cm" svg:y="1.437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2.42949831877611) translate (6.075cm 3.436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27" draw:text-style-name="P9" draw:layer="layout" svg:width="3.492cm" svg:height="3.095cm" svg:x="21.863cm" svg:y="1.09cm">
          <draw:text-box>
            <text:p><text:span text:style-name="T1">Some attack</text:span></text:p>
            <text:p><text:span text:style-name="T1">DQCF+LP</text:span></text:p>
            <text:p><text:span text:style-name="T1"/></text:p>
          </draw:text-box>
        </draw:frame>
        <draw:frame draw:style-name="gr3" draw:text-style-name="P3" draw:layer="layout" svg:width="2.909cm" svg:height="2.83cm" svg:x="12.959cm" svg:y="0.975cm">
          <draw:image xlink:href="Pictures/100000000000006E0000006B0DF23044.png" xlink:type="simple" xlink:show="embed" xlink:actuate="onLoad" draw:mime-type="image/png">
            <text:p/>
          </draw:image>
        </draw:frame>
        <draw:custom-shape draw:style-name="gr14" draw:text-style-name="P6" draw:layer="layout" svg:width="2.315cm" svg:height="2.298cm" svg:x="10.011cm" svg:y="1.08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075.5426917510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g draw:style-name="gr15">
          <draw:custom-shape draw:style-name="gr16" draw:text-style-name="P6" draw:layer="layout" svg:width="2.959cm" svg:height="0.488cm" svg:x="17.581cm" svg:y="1.5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6" draw:layer="layout" svg:width="2.975cm" svg:height="0.452cm" svg:x="17.582cm" svg:y="2.522cm">
            <text:p/>
            <draw:enhanced-geometry svg:viewBox="0 0 21600 21600" draw:type="rectangle" draw:enhanced-path="M 0 0 L 21600 0 21600 21600 0 21600 0 0 Z N"/>
          </draw:custom-shape>
        </draw:g>
        <draw:custom-shape draw:style-name="gr7" draw:text-style-name="P6" draw:layer="layout" svg:width="2.019cm" svg:height="1.932cm" svg:x="1.958cm" svg:y="4.884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6" draw:layer="layout" svg:width="1.619cm" svg:height="1.618cm" svg:x="4.565cm" svg:y="5.148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2.42949831877611) translate (8.017cm 6.906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28" draw:text-style-name="P9" draw:layer="layout" svg:width="3.492cm" svg:height="3.806cm" svg:x="21.711cm" svg:y="4.954cm">
          <draw:text-box>
            <text:p><text:span text:style-name="T1">Some other attack</text:span></text:p>
            <text:p text:style-name="P12"><text:span text:style-name="T1">FDPD+LP</text:span></text:p>
            <text:p><text:span text:style-name="T1"/></text:p>
          </draw:text-box>
        </draw:frame>
        <draw:frame draw:style-name="gr3" draw:text-style-name="P3" draw:layer="layout" svg:width="2.909cm" svg:height="2.83cm" svg:x="12.807cm" svg:y="4.839cm">
          <draw:image xlink:href="Pictures/100000000000006E0000006B0DF23044.png" xlink:type="simple" xlink:show="embed" xlink:actuate="onLoad" draw:mime-type="image/png">
            <text:p/>
          </draw:image>
        </draw:frame>
        <draw:custom-shape draw:style-name="gr14" draw:text-style-name="P6" draw:layer="layout" svg:width="2.315cm" svg:height="2.298cm" svg:x="9.859cm" svg:y="4.94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075.5426917510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g draw:style-name="gr15">
          <draw:custom-shape draw:style-name="gr16" draw:text-style-name="P6" draw:layer="layout" svg:width="2.959cm" svg:height="0.488cm" svg:x="17.429cm" svg:y="5.394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6" draw:layer="layout" svg:width="2.975cm" svg:height="0.452cm" svg:x="17.43cm" svg:y="6.386cm">
            <text:p/>
            <draw:enhanced-geometry svg:viewBox="0 0 21600 21600" draw:type="rectangle" draw:enhanced-path="M 0 0 L 21600 0 21600 21600 0 21600 0 0 Z N"/>
          </draw:custom-shape>
        </draw:g>
        <draw:custom-shape draw:style-name="gr8" draw:text-style-name="P6" draw:layer="layout" svg:width="1.566cm" svg:height="1.741cm" svg:x="7.623cm" svg:y="8.251cm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6" draw:layer="layout" svg:width="1.619cm" svg:height="1.618cm" svg:x="1.843cm" svg:y="8.593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0.776322451287078) translate (4.287cm 9.059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3" draw:text-style-name="P3" draw:layer="layout" svg:width="2.534cm" svg:height="2.497cm" svg:x="13.17cm" svg:y="7.984cm">
          <draw:image xlink:href="Pictures/1000000000000088000000862D9EE71B.png" xlink:type="simple" xlink:show="embed" xlink:actuate="onLoad" draw:mime-type="image/png">
            <text:p/>
          </draw:image>
        </draw:frame>
        <draw:custom-shape draw:style-name="gr14" draw:text-style-name="P6" draw:layer="layout" svg:width="2.315cm" svg:height="2.298cm" svg:x="9.955cm" svg:y="8.02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075.5426917510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g draw:style-name="gr15">
          <draw:custom-shape draw:style-name="gr16" draw:text-style-name="P6" draw:layer="layout" svg:width="2.959cm" svg:height="0.488cm" svg:x="17.505cm" svg:y="8.76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6" draw:layer="layout" svg:width="2.975cm" svg:height="0.452cm" svg:x="17.506cm" svg:y="9.755cm">
            <text:p/>
            <draw:enhanced-geometry svg:viewBox="0 0 21600 21600" draw:type="rectangle" draw:enhanced-path="M 0 0 L 21600 0 21600 21600 0 21600 0 0 Z N"/>
          </draw:custom-shape>
        </draw:g>
        <draw:frame draw:style-name="gr29" draw:text-style-name="P9" draw:layer="layout" svg:width="4.29cm" svg:height="4.517cm" svg:x="21.902cm" svg:y="8.552cm">
          <draw:text-box>
            <text:p><text:span text:style-name="T1">Some other other attack</text:span></text:p>
            <text:p text:style-name="P12"><text:span text:style-name="T1">DQCB e+HK</text:span></text:p>
            <text:p><text:span text:style-name="T1"/></text:p>
          </draw:text-box>
        </draw:frame>
        <draw:frame draw:style-name="gr30" draw:text-style-name="P9" draw:layer="layout" svg:width="5.775cm" svg:height="0.962cm" svg:x="21.235cm" svg:y="0.094cm">
          <draw:text-box>
            <text:p><text:span text:style-name="T1">Add images V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custom-shape draw:style-name="gr7" draw:text-style-name="P6" draw:layer="layout" svg:width="2.019cm" svg:height="1.932cm" svg:x="13.758cm" svg:y="5.513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6" draw:layer="layout" svg:width="1.619cm" svg:height="1.618cm" svg:x="17.165cm" svg:y="5.624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2.42949831877611) translate (20.617cm 7.382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8" draw:text-style-name="P6" draw:layer="layout" svg:width="1.566cm" svg:height="1.741cm" svg:x="7.661cm" svg:y="5.567cm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8" draw:layer="layout" svg:width="1.689cm" svg:height="1.689cm" svg:x="10.985cm" svg:y="5.6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2.019cm" svg:height="1.932cm" svg:x="8.273cm" svg:y="9.534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8" draw:layer="layout" svg:width="1.689cm" svg:height="1.689cm" svg:x="19.876cm" svg:y="9.466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17.172cm" svg:y="9.37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2.039cm" svg:y="9.465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4.952cm" svg:y="9.37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22.845cm" svg:y="5.22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22.94cm" svg:y="9.751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3" draw:layer="layout" svg:width="2.874cm" svg:height="1.673cm" svg:x="2.037cm" svg:y="3.693cm">
          <draw:text-box>
            <text:p text:style-name="P12">oldest</text:p>
          </draw:text-box>
        </draw:frame>
        <draw:frame draw:style-name="gr32" draw:text-style-name="P14" draw:layer="layout" svg:width="3.116cm" svg:height="1.673cm" svg:x="22.727cm" svg:y="12.405cm">
          <draw:text-box>
            <text:p>Newest</text:p>
          </draw:text-box>
        </draw:frame>
        <draw:custom-shape draw:style-name="gr33" draw:text-style-name="P15" draw:layer="layout" svg:width="2.268cm" svg:height="3.96cm" svg:x="1.805cm" svg:y="4.49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019cm" svg:height="1.932cm" svg:x="9.801cm" svg:y="0.545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6" draw:layer="layout" svg:width="1.881cm" svg:height="1.376cm" svg:x="15.238cm" svg:y="0.875cm">
          <text:p/>
          <draw:enhanced-geometry svg:viewBox="0 0 21600 21600" draw:mirror-horizontal="false" draw:mirror-vertical="false" draw:text-areas="?f0 ?f7 ?f2 21600" draw:type="up-arrow" draw:modifiers="10650.9803921569 5531.265716680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-2.40942703237817) translate (14.689cm 1.664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7" draw:text-style-name="P6" draw:layer="layout" svg:width="2.019cm" svg:height="1.932cm" svg:x="1.805cm" svg:y="5.546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8" draw:layer="layout" svg:width="1.689cm" svg:height="1.689cm" svg:x="4.848cm" svg:y="5.654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566cm" svg:height="1.741cm" draw:transform="rotate (-2.40942703237817) translate (13.262cm 10.58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6" draw:layer="layout" svg:width="1.881cm" svg:height="1.376cm" svg:x="13.678cm" svg:y="9.659cm">
          <text:p/>
          <draw:enhanced-geometry svg:viewBox="0 0 21600 21600" draw:mirror-horizontal="false" draw:mirror-vertical="false" draw:text-areas="?f0 ?f7 ?f2 21600" draw:type="up-arrow" draw:modifiers="10650.9803921569 5531.265716680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33" draw:text-style-name="P15" draw:layer="layout" svg:width="2.268cm" svg:height="3.96cm" svg:x="10.889cm" svg:y="8.45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2.268cm" svg:height="3.96cm" svg:x="13.358cm" svg:y="8.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6" draw:layer="layout" svg:width="3.588cm" svg:height="3.282cm" svg:x="0.841cm" svg:y="4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custom-shape draw:style-name="gr7" draw:text-style-name="P6" draw:layer="layout" svg:width="2.019cm" svg:height="1.932cm" svg:x="13.758cm" svg:y="5.513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6" draw:layer="layout" svg:width="1.619cm" svg:height="1.618cm" svg:x="17.165cm" svg:y="5.624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2.42949831877611) translate (20.617cm 7.382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8" draw:text-style-name="P6" draw:layer="layout" svg:width="1.566cm" svg:height="1.741cm" svg:x="7.661cm" svg:y="5.567cm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8" draw:layer="layout" svg:width="1.689cm" svg:height="1.689cm" svg:x="10.985cm" svg:y="5.6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2.019cm" svg:height="1.932cm" svg:x="8.273cm" svg:y="9.534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8" draw:layer="layout" svg:width="1.689cm" svg:height="1.689cm" svg:x="19.876cm" svg:y="9.466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17.172cm" svg:y="9.37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2.039cm" svg:y="9.465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4.952cm" svg:y="9.37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22.845cm" svg:y="5.22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22.94cm" svg:y="9.751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3" draw:layer="layout" svg:width="2.874cm" svg:height="1.673cm" svg:x="2.037cm" svg:y="3.693cm">
          <draw:text-box>
            <text:p text:style-name="P12">oldest</text:p>
          </draw:text-box>
        </draw:frame>
        <draw:frame draw:style-name="gr32" draw:text-style-name="P14" draw:layer="layout" svg:width="3.116cm" svg:height="1.673cm" svg:x="22.727cm" svg:y="12.405cm">
          <draw:text-box>
            <text:p>Newest</text:p>
          </draw:text-box>
        </draw:frame>
        <draw:custom-shape draw:style-name="gr33" draw:text-style-name="P15" draw:layer="layout" svg:width="2.268cm" svg:height="3.96cm" svg:x="1.805cm" svg:y="4.49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019cm" svg:height="1.932cm" svg:x="9.801cm" svg:y="0.545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6" draw:layer="layout" svg:width="1.881cm" svg:height="1.376cm" svg:x="15.238cm" svg:y="0.875cm">
          <text:p/>
          <draw:enhanced-geometry svg:viewBox="0 0 21600 21600" draw:mirror-horizontal="false" draw:mirror-vertical="false" draw:text-areas="?f0 ?f7 ?f2 21600" draw:type="up-arrow" draw:modifiers="10650.9803921569 5531.265716680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-2.40942703237817) translate (14.689cm 1.664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7" draw:text-style-name="P6" draw:layer="layout" svg:width="2.019cm" svg:height="1.932cm" svg:x="1.805cm" svg:y="5.546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8" draw:layer="layout" svg:width="1.689cm" svg:height="1.689cm" svg:x="4.848cm" svg:y="5.654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566cm" svg:height="1.741cm" draw:transform="rotate (-2.40942703237817) translate (13.262cm 10.58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6" draw:layer="layout" svg:width="1.881cm" svg:height="1.376cm" svg:x="13.678cm" svg:y="9.659cm">
          <text:p/>
          <draw:enhanced-geometry svg:viewBox="0 0 21600 21600" draw:mirror-horizontal="false" draw:mirror-vertical="false" draw:text-areas="?f0 ?f7 ?f2 21600" draw:type="up-arrow" draw:modifiers="10650.9803921569 5531.265716680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33" draw:text-style-name="P15" draw:layer="layout" svg:width="2.268cm" svg:height="3.96cm" svg:x="10.889cm" svg:y="8.45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2.268cm" svg:height="3.96cm" svg:x="13.358cm" svg:y="8.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6" draw:layer="layout" svg:width="3.588cm" svg:height="3.282cm" svg:x="3.843cm" svg:y="4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5">
          <draw:line draw:style-name="gr35" draw:text-style-name="P17" draw:layer="layout" svg:x1="9.954cm" svg:y1="1.018cm" svg:x2="10.762cm" svg:y2="1.96cm">
            <text:p/>
          </draw:line>
          <draw:line draw:style-name="gr35" draw:text-style-name="P17" draw:layer="layout" svg:x1="10.404cm" svg:y1="1.933cm" svg:x2="11.88cm" svg:y2="0.763cm">
            <text:p/>
          </draw:line>
        </draw:g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custom-shape draw:style-name="gr7" draw:text-style-name="P6" draw:layer="layout" svg:width="2.019cm" svg:height="1.932cm" svg:x="13.758cm" svg:y="5.513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6" draw:layer="layout" svg:width="1.619cm" svg:height="1.618cm" svg:x="17.165cm" svg:y="5.624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2.42949831877611) translate (20.617cm 7.382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8" draw:text-style-name="P6" draw:layer="layout" svg:width="1.566cm" svg:height="1.741cm" svg:x="7.661cm" svg:y="5.567cm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8" draw:layer="layout" svg:width="1.689cm" svg:height="1.689cm" svg:x="10.985cm" svg:y="5.6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2.019cm" svg:height="1.932cm" svg:x="8.273cm" svg:y="9.534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8" draw:layer="layout" svg:width="1.689cm" svg:height="1.689cm" svg:x="19.876cm" svg:y="9.466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17.172cm" svg:y="9.37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2.039cm" svg:y="9.465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4.952cm" svg:y="9.37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22.845cm" svg:y="5.22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22.94cm" svg:y="9.751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3" draw:layer="layout" svg:width="2.874cm" svg:height="1.673cm" svg:x="2.037cm" svg:y="3.693cm">
          <draw:text-box>
            <text:p text:style-name="P12">oldest</text:p>
          </draw:text-box>
        </draw:frame>
        <draw:frame draw:style-name="gr32" draw:text-style-name="P14" draw:layer="layout" svg:width="3.116cm" svg:height="1.673cm" svg:x="22.727cm" svg:y="12.405cm">
          <draw:text-box>
            <text:p>Newest</text:p>
          </draw:text-box>
        </draw:frame>
        <draw:custom-shape draw:style-name="gr33" draw:text-style-name="P15" draw:layer="layout" svg:width="2.268cm" svg:height="3.96cm" svg:x="1.805cm" svg:y="4.49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019cm" svg:height="1.932cm" svg:x="9.801cm" svg:y="0.545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6" draw:layer="layout" svg:width="1.881cm" svg:height="1.376cm" svg:x="15.238cm" svg:y="0.875cm">
          <text:p/>
          <draw:enhanced-geometry svg:viewBox="0 0 21600 21600" draw:mirror-horizontal="false" draw:mirror-vertical="false" draw:text-areas="?f0 ?f7 ?f2 21600" draw:type="up-arrow" draw:modifiers="10650.9803921569 5531.265716680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-2.40942703237817) translate (14.689cm 1.664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7" draw:text-style-name="P6" draw:layer="layout" svg:width="2.019cm" svg:height="1.932cm" svg:x="1.805cm" svg:y="5.546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8" draw:layer="layout" svg:width="1.689cm" svg:height="1.689cm" svg:x="4.848cm" svg:y="5.654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566cm" svg:height="1.741cm" draw:transform="rotate (-2.40942703237817) translate (13.262cm 10.58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6" draw:layer="layout" svg:width="1.881cm" svg:height="1.376cm" svg:x="13.678cm" svg:y="9.659cm">
          <text:p/>
          <draw:enhanced-geometry svg:viewBox="0 0 21600 21600" draw:mirror-horizontal="false" draw:mirror-vertical="false" draw:text-areas="?f0 ?f7 ?f2 21600" draw:type="up-arrow" draw:modifiers="10650.9803921569 5531.265716680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33" draw:text-style-name="P15" draw:layer="layout" svg:width="2.268cm" svg:height="3.96cm" svg:x="10.889cm" svg:y="8.45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2.268cm" svg:height="3.96cm" svg:x="13.358cm" svg:y="8.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6" draw:layer="layout" svg:width="3.588cm" svg:height="3.282cm" svg:x="6.718cm" svg:y="4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5">
          <draw:line draw:style-name="gr35" draw:text-style-name="P17" draw:layer="layout" svg:x1="9.954cm" svg:y1="1.018cm" svg:x2="10.762cm" svg:y2="1.96cm">
            <text:p/>
          </draw:line>
          <draw:line draw:style-name="gr35" draw:text-style-name="P17" draw:layer="layout" svg:x1="10.404cm" svg:y1="1.933cm" svg:x2="11.88cm" svg:y2="0.763cm">
            <text:p/>
          </draw:line>
        </draw:g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custom-shape draw:style-name="gr7" draw:text-style-name="P6" draw:layer="layout" svg:width="2.019cm" svg:height="1.932cm" svg:x="13.758cm" svg:y="5.513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6" draw:layer="layout" svg:width="1.619cm" svg:height="1.618cm" svg:x="17.165cm" svg:y="5.624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2.42949831877611) translate (20.617cm 7.382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8" draw:text-style-name="P6" draw:layer="layout" svg:width="1.566cm" svg:height="1.741cm" svg:x="7.661cm" svg:y="5.567cm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8" draw:layer="layout" svg:width="1.689cm" svg:height="1.689cm" svg:x="10.985cm" svg:y="5.6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2.019cm" svg:height="1.932cm" svg:x="8.273cm" svg:y="9.534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8" draw:layer="layout" svg:width="1.689cm" svg:height="1.689cm" svg:x="19.876cm" svg:y="9.466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17.172cm" svg:y="9.37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2.039cm" svg:y="9.465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4.952cm" svg:y="9.37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22.845cm" svg:y="5.22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22.94cm" svg:y="9.751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3" draw:layer="layout" svg:width="2.874cm" svg:height="1.673cm" svg:x="2.037cm" svg:y="3.693cm">
          <draw:text-box>
            <text:p text:style-name="P12">oldest</text:p>
          </draw:text-box>
        </draw:frame>
        <draw:frame draw:style-name="gr32" draw:text-style-name="P14" draw:layer="layout" svg:width="3.116cm" svg:height="1.673cm" svg:x="22.727cm" svg:y="12.405cm">
          <draw:text-box>
            <text:p>Newest</text:p>
          </draw:text-box>
        </draw:frame>
        <draw:custom-shape draw:style-name="gr33" draw:text-style-name="P15" draw:layer="layout" svg:width="2.268cm" svg:height="3.96cm" svg:x="1.805cm" svg:y="4.49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019cm" svg:height="1.932cm" svg:x="9.801cm" svg:y="0.545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6" draw:layer="layout" svg:width="1.881cm" svg:height="1.376cm" svg:x="15.238cm" svg:y="0.875cm">
          <text:p/>
          <draw:enhanced-geometry svg:viewBox="0 0 21600 21600" draw:mirror-horizontal="false" draw:mirror-vertical="false" draw:text-areas="?f0 ?f7 ?f2 21600" draw:type="up-arrow" draw:modifiers="10650.9803921569 5531.265716680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-2.40942703237817) translate (14.689cm 1.664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7" draw:text-style-name="P6" draw:layer="layout" svg:width="2.019cm" svg:height="1.932cm" svg:x="1.805cm" svg:y="5.546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8" draw:layer="layout" svg:width="1.689cm" svg:height="1.689cm" svg:x="4.848cm" svg:y="5.654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566cm" svg:height="1.741cm" draw:transform="rotate (-2.40942703237817) translate (13.262cm 10.58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6" draw:layer="layout" svg:width="1.881cm" svg:height="1.376cm" svg:x="13.678cm" svg:y="9.659cm">
          <text:p/>
          <draw:enhanced-geometry svg:viewBox="0 0 21600 21600" draw:mirror-horizontal="false" draw:mirror-vertical="false" draw:text-areas="?f0 ?f7 ?f2 21600" draw:type="up-arrow" draw:modifiers="10650.9803921569 5531.265716680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33" draw:text-style-name="P15" draw:layer="layout" svg:width="2.268cm" svg:height="3.96cm" svg:x="10.889cm" svg:y="8.45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2.268cm" svg:height="3.96cm" svg:x="13.358cm" svg:y="8.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6" draw:layer="layout" svg:width="3.588cm" svg:height="3.282cm" svg:x="10.102cm" svg:y="4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5">
          <draw:line draw:style-name="gr35" draw:text-style-name="P17" draw:layer="layout" svg:x1="9.954cm" svg:y1="1.018cm" svg:x2="10.762cm" svg:y2="1.96cm">
            <text:p/>
          </draw:line>
          <draw:line draw:style-name="gr35" draw:text-style-name="P17" draw:layer="layout" svg:x1="10.404cm" svg:y1="1.933cm" svg:x2="11.88cm" svg:y2="0.763cm">
            <text:p/>
          </draw:line>
        </draw:g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custom-shape draw:style-name="gr7" draw:text-style-name="P6" draw:layer="layout" svg:width="2.019cm" svg:height="1.932cm" svg:x="13.758cm" svg:y="5.513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6" draw:layer="layout" svg:width="1.619cm" svg:height="1.618cm" svg:x="17.165cm" svg:y="5.624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2.42949831877611) translate (20.617cm 7.382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8" draw:text-style-name="P6" draw:layer="layout" svg:width="1.566cm" svg:height="1.741cm" svg:x="7.661cm" svg:y="5.567cm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8" draw:layer="layout" svg:width="1.689cm" svg:height="1.689cm" svg:x="10.985cm" svg:y="5.6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2.019cm" svg:height="1.932cm" svg:x="8.273cm" svg:y="9.534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8" draw:layer="layout" svg:width="1.689cm" svg:height="1.689cm" svg:x="19.876cm" svg:y="9.466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17.172cm" svg:y="9.37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2.039cm" svg:y="9.465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4.952cm" svg:y="9.37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22.845cm" svg:y="5.22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22.94cm" svg:y="9.751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3" draw:layer="layout" svg:width="2.874cm" svg:height="1.673cm" svg:x="2.037cm" svg:y="3.693cm">
          <draw:text-box>
            <text:p text:style-name="P12">oldest</text:p>
          </draw:text-box>
        </draw:frame>
        <draw:frame draw:style-name="gr32" draw:text-style-name="P14" draw:layer="layout" svg:width="3.116cm" svg:height="1.673cm" svg:x="22.727cm" svg:y="12.405cm">
          <draw:text-box>
            <text:p>Newest</text:p>
          </draw:text-box>
        </draw:frame>
        <draw:custom-shape draw:style-name="gr33" draw:text-style-name="P15" draw:layer="layout" svg:width="2.268cm" svg:height="3.96cm" svg:x="1.805cm" svg:y="4.49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019cm" svg:height="1.932cm" svg:x="9.801cm" svg:y="0.545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6" draw:layer="layout" svg:width="1.881cm" svg:height="1.376cm" svg:x="15.238cm" svg:y="0.875cm">
          <text:p/>
          <draw:enhanced-geometry svg:viewBox="0 0 21600 21600" draw:mirror-horizontal="false" draw:mirror-vertical="false" draw:text-areas="?f0 ?f7 ?f2 21600" draw:type="up-arrow" draw:modifiers="10650.9803921569 5531.265716680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-2.40942703237817) translate (14.689cm 1.664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7" draw:text-style-name="P6" draw:layer="layout" svg:width="2.019cm" svg:height="1.932cm" svg:x="1.805cm" svg:y="5.546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8" draw:layer="layout" svg:width="1.689cm" svg:height="1.689cm" svg:x="4.848cm" svg:y="5.654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566cm" svg:height="1.741cm" draw:transform="rotate (-2.40942703237817) translate (13.262cm 10.58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6" draw:layer="layout" svg:width="1.881cm" svg:height="1.376cm" svg:x="13.678cm" svg:y="9.659cm">
          <text:p/>
          <draw:enhanced-geometry svg:viewBox="0 0 21600 21600" draw:mirror-horizontal="false" draw:mirror-vertical="false" draw:text-areas="?f0 ?f7 ?f2 21600" draw:type="up-arrow" draw:modifiers="10650.9803921569 5531.265716680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33" draw:text-style-name="P15" draw:layer="layout" svg:width="2.268cm" svg:height="3.96cm" svg:x="10.889cm" svg:y="8.45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2.268cm" svg:height="3.96cm" svg:x="13.358cm" svg:y="8.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6" draw:layer="layout" svg:width="3.588cm" svg:height="3.282cm" svg:x="12.799cm" svg:y="4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5">
          <draw:line draw:style-name="gr35" draw:text-style-name="P17" draw:layer="layout" svg:x1="9.954cm" svg:y1="1.018cm" svg:x2="10.762cm" svg:y2="1.96cm">
            <text:p/>
          </draw:line>
          <draw:line draw:style-name="gr35" draw:text-style-name="P17" draw:layer="layout" svg:x1="10.404cm" svg:y1="1.933cm" svg:x2="11.88cm" svg:y2="0.763cm">
            <text:p/>
          </draw:line>
        </draw:g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custom-shape draw:style-name="gr7" draw:text-style-name="P6" draw:layer="layout" svg:width="2.019cm" svg:height="1.932cm" svg:x="13.758cm" svg:y="5.513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6" draw:layer="layout" svg:width="1.619cm" svg:height="1.618cm" svg:x="17.165cm" svg:y="5.624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2.42949831877611) translate (20.617cm 7.382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8" draw:text-style-name="P6" draw:layer="layout" svg:width="1.566cm" svg:height="1.741cm" svg:x="7.661cm" svg:y="5.567cm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8" draw:layer="layout" svg:width="1.689cm" svg:height="1.689cm" svg:x="10.985cm" svg:y="5.6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2.019cm" svg:height="1.932cm" svg:x="8.273cm" svg:y="9.534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8" draw:layer="layout" svg:width="1.689cm" svg:height="1.689cm" svg:x="19.876cm" svg:y="9.466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17.172cm" svg:y="9.37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2.039cm" svg:y="9.465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4.952cm" svg:y="9.37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22.845cm" svg:y="5.22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22.94cm" svg:y="9.751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3" draw:layer="layout" svg:width="2.874cm" svg:height="1.673cm" svg:x="2.037cm" svg:y="3.693cm">
          <draw:text-box>
            <text:p text:style-name="P12">oldest</text:p>
          </draw:text-box>
        </draw:frame>
        <draw:frame draw:style-name="gr32" draw:text-style-name="P14" draw:layer="layout" svg:width="3.116cm" svg:height="1.673cm" svg:x="22.727cm" svg:y="12.405cm">
          <draw:text-box>
            <text:p>Newest</text:p>
          </draw:text-box>
        </draw:frame>
        <draw:custom-shape draw:style-name="gr33" draw:text-style-name="P15" draw:layer="layout" svg:width="2.268cm" svg:height="3.96cm" svg:x="1.805cm" svg:y="4.49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019cm" svg:height="1.932cm" svg:x="9.801cm" svg:y="0.545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6" draw:layer="layout" svg:width="1.881cm" svg:height="1.376cm" svg:x="15.238cm" svg:y="0.875cm">
          <text:p/>
          <draw:enhanced-geometry svg:viewBox="0 0 21600 21600" draw:mirror-horizontal="false" draw:mirror-vertical="false" draw:text-areas="?f0 ?f7 ?f2 21600" draw:type="up-arrow" draw:modifiers="10650.9803921569 5531.265716680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-2.40942703237817) translate (14.689cm 1.664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7" draw:text-style-name="P6" draw:layer="layout" svg:width="2.019cm" svg:height="1.932cm" svg:x="1.805cm" svg:y="5.546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8" draw:layer="layout" svg:width="1.689cm" svg:height="1.689cm" svg:x="4.848cm" svg:y="5.654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566cm" svg:height="1.741cm" draw:transform="rotate (-2.40942703237817) translate (13.262cm 10.58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6" draw:layer="layout" svg:width="1.881cm" svg:height="1.376cm" svg:x="13.678cm" svg:y="9.659cm">
          <text:p/>
          <draw:enhanced-geometry svg:viewBox="0 0 21600 21600" draw:mirror-horizontal="false" draw:mirror-vertical="false" draw:text-areas="?f0 ?f7 ?f2 21600" draw:type="up-arrow" draw:modifiers="10650.9803921569 5531.265716680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33" draw:text-style-name="P15" draw:layer="layout" svg:width="2.268cm" svg:height="3.96cm" svg:x="10.889cm" svg:y="8.45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2.268cm" svg:height="3.96cm" svg:x="13.358cm" svg:y="8.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6" draw:layer="layout" svg:width="3.588cm" svg:height="3.282cm" svg:x="16.182cm" svg:y="4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5">
          <draw:line draw:style-name="gr35" draw:text-style-name="P17" draw:layer="layout" svg:x1="9.954cm" svg:y1="1.018cm" svg:x2="10.762cm" svg:y2="1.96cm">
            <text:p/>
          </draw:line>
          <draw:line draw:style-name="gr35" draw:text-style-name="P17" draw:layer="layout" svg:x1="10.404cm" svg:y1="1.933cm" svg:x2="11.88cm" svg:y2="0.763cm">
            <text:p/>
          </draw:line>
        </draw:g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custom-shape draw:style-name="gr7" draw:text-style-name="P6" draw:layer="layout" svg:width="2.019cm" svg:height="1.932cm" svg:x="13.758cm" svg:y="5.513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6" draw:layer="layout" svg:width="1.619cm" svg:height="1.618cm" svg:x="17.165cm" svg:y="5.624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2.42949831877611) translate (20.617cm 7.382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8" draw:text-style-name="P6" draw:layer="layout" svg:width="1.566cm" svg:height="1.741cm" svg:x="7.661cm" svg:y="5.567cm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8" draw:layer="layout" svg:width="1.689cm" svg:height="1.689cm" svg:x="10.985cm" svg:y="5.6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2.019cm" svg:height="1.932cm" svg:x="8.273cm" svg:y="9.534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8" draw:layer="layout" svg:width="1.689cm" svg:height="1.689cm" svg:x="19.876cm" svg:y="9.466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17.172cm" svg:y="9.37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2.039cm" svg:y="9.465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4.952cm" svg:y="9.37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22.845cm" svg:y="5.22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22.94cm" svg:y="9.751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3" draw:layer="layout" svg:width="2.874cm" svg:height="1.673cm" svg:x="2.037cm" svg:y="3.693cm">
          <draw:text-box>
            <text:p text:style-name="P12">oldest</text:p>
          </draw:text-box>
        </draw:frame>
        <draw:frame draw:style-name="gr32" draw:text-style-name="P14" draw:layer="layout" svg:width="3.116cm" svg:height="1.673cm" svg:x="22.727cm" svg:y="12.405cm">
          <draw:text-box>
            <text:p>Newest</text:p>
          </draw:text-box>
        </draw:frame>
        <draw:custom-shape draw:style-name="gr33" draw:text-style-name="P15" draw:layer="layout" svg:width="2.268cm" svg:height="3.96cm" svg:x="1.805cm" svg:y="4.49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019cm" svg:height="1.932cm" svg:x="9.801cm" svg:y="0.545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6" draw:layer="layout" svg:width="1.881cm" svg:height="1.376cm" svg:x="15.238cm" svg:y="0.875cm">
          <text:p/>
          <draw:enhanced-geometry svg:viewBox="0 0 21600 21600" draw:mirror-horizontal="false" draw:mirror-vertical="false" draw:text-areas="?f0 ?f7 ?f2 21600" draw:type="up-arrow" draw:modifiers="10650.9803921569 5531.265716680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-2.40942703237817) translate (14.689cm 1.664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7" draw:text-style-name="P6" draw:layer="layout" svg:width="2.019cm" svg:height="1.932cm" svg:x="1.805cm" svg:y="5.546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8" draw:layer="layout" svg:width="1.689cm" svg:height="1.689cm" svg:x="4.848cm" svg:y="5.654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566cm" svg:height="1.741cm" draw:transform="rotate (-2.40942703237817) translate (13.262cm 10.58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6" draw:layer="layout" svg:width="1.881cm" svg:height="1.376cm" svg:x="13.678cm" svg:y="9.659cm">
          <text:p/>
          <draw:enhanced-geometry svg:viewBox="0 0 21600 21600" draw:mirror-horizontal="false" draw:mirror-vertical="false" draw:text-areas="?f0 ?f7 ?f2 21600" draw:type="up-arrow" draw:modifiers="10650.9803921569 5531.265716680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33" draw:text-style-name="P15" draw:layer="layout" svg:width="2.268cm" svg:height="3.96cm" svg:x="10.889cm" svg:y="8.45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2.268cm" svg:height="3.96cm" svg:x="13.358cm" svg:y="8.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6" draw:layer="layout" svg:width="3.588cm" svg:height="3.282cm" svg:x="18.879cm" svg:y="4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5" draw:layer="layout" svg:width="2.268cm" svg:height="3.96cm" svg:x="10.889cm" svg:y="8.451cm">
          <text:p/>
          <draw:enhanced-geometry svg:viewBox="0 0 21600 21600" draw:type="rectangle" draw:enhanced-path="M 0 0 L 21600 0 21600 21600 0 21600 0 0 Z N"/>
        </draw:custom-shape>
        <draw:g draw:style-name="gr5">
          <draw:line draw:style-name="gr35" draw:text-style-name="P17" draw:layer="layout" svg:x1="9.954cm" svg:y1="1.018cm" svg:x2="10.762cm" svg:y2="1.96cm">
            <text:p/>
          </draw:line>
          <draw:line draw:style-name="gr35" draw:text-style-name="P17" draw:layer="layout" svg:x1="10.404cm" svg:y1="1.933cm" svg:x2="11.88cm" svg:y2="0.763cm">
            <text:p/>
          </draw:line>
        </draw:g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custom-shape draw:style-name="gr7" draw:text-style-name="P6" draw:layer="layout" svg:width="2.019cm" svg:height="1.932cm" svg:x="13.758cm" svg:y="5.513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6" draw:layer="layout" svg:width="1.619cm" svg:height="1.618cm" svg:x="17.165cm" svg:y="5.624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2.42949831877611) translate (20.617cm 7.382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8" draw:text-style-name="P6" draw:layer="layout" svg:width="1.566cm" svg:height="1.741cm" svg:x="7.661cm" svg:y="5.567cm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8" draw:layer="layout" svg:width="1.689cm" svg:height="1.689cm" svg:x="10.985cm" svg:y="5.6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2.019cm" svg:height="1.932cm" svg:x="8.273cm" svg:y="9.534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8" draw:layer="layout" svg:width="1.689cm" svg:height="1.689cm" svg:x="19.876cm" svg:y="9.466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17.172cm" svg:y="9.37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2.039cm" svg:y="9.465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4.952cm" svg:y="9.37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22.845cm" svg:y="5.22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22.94cm" svg:y="9.751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3" draw:layer="layout" svg:width="2.874cm" svg:height="1.673cm" svg:x="2.037cm" svg:y="3.693cm">
          <draw:text-box>
            <text:p text:style-name="P12">oldest</text:p>
          </draw:text-box>
        </draw:frame>
        <draw:frame draw:style-name="gr32" draw:text-style-name="P14" draw:layer="layout" svg:width="3.116cm" svg:height="1.673cm" svg:x="22.727cm" svg:y="12.405cm">
          <draw:text-box>
            <text:p>Newest</text:p>
          </draw:text-box>
        </draw:frame>
        <draw:custom-shape draw:style-name="gr33" draw:text-style-name="P15" draw:layer="layout" svg:width="2.268cm" svg:height="3.96cm" svg:x="1.805cm" svg:y="4.49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019cm" svg:height="1.932cm" svg:x="9.801cm" svg:y="0.545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6" draw:layer="layout" svg:width="1.881cm" svg:height="1.376cm" svg:x="15.238cm" svg:y="0.875cm">
          <text:p/>
          <draw:enhanced-geometry svg:viewBox="0 0 21600 21600" draw:mirror-horizontal="false" draw:mirror-vertical="false" draw:text-areas="?f0 ?f7 ?f2 21600" draw:type="up-arrow" draw:modifiers="10650.9803921569 5531.265716680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-2.40942703237817) translate (14.689cm 1.664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7" draw:text-style-name="P6" draw:layer="layout" svg:width="2.019cm" svg:height="1.932cm" svg:x="1.805cm" svg:y="5.546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8" draw:layer="layout" svg:width="1.689cm" svg:height="1.689cm" svg:x="4.848cm" svg:y="5.654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566cm" svg:height="1.741cm" draw:transform="rotate (-2.40942703237817) translate (13.262cm 10.58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6" draw:layer="layout" svg:width="1.881cm" svg:height="1.376cm" svg:x="13.678cm" svg:y="9.659cm">
          <text:p/>
          <draw:enhanced-geometry svg:viewBox="0 0 21600 21600" draw:mirror-horizontal="false" draw:mirror-vertical="false" draw:text-areas="?f0 ?f7 ?f2 21600" draw:type="up-arrow" draw:modifiers="10650.9803921569 5531.265716680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33" draw:text-style-name="P15" draw:layer="layout" svg:width="2.268cm" svg:height="3.96cm" svg:x="10.889cm" svg:y="8.45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2.268cm" svg:height="3.96cm" svg:x="13.358cm" svg:y="8.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6" draw:layer="layout" svg:width="3.588cm" svg:height="3.282cm" svg:x="21.906cm" svg:y="4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5" draw:layer="layout" svg:width="2.268cm" svg:height="3.96cm" svg:x="10.889cm" svg:y="8.451cm">
          <text:p/>
          <draw:enhanced-geometry svg:viewBox="0 0 21600 21600" draw:type="rectangle" draw:enhanced-path="M 0 0 L 21600 0 21600 21600 0 21600 0 0 Z N"/>
        </draw:custom-shape>
        <draw:g draw:style-name="gr5">
          <draw:line draw:style-name="gr35" draw:text-style-name="P17" draw:layer="layout" svg:x1="9.954cm" svg:y1="1.018cm" svg:x2="10.762cm" svg:y2="1.96cm">
            <text:p/>
          </draw:line>
          <draw:line draw:style-name="gr35" draw:text-style-name="P17" draw:layer="layout" svg:x1="10.404cm" svg:y1="1.933cm" svg:x2="11.88cm" svg:y2="0.763cm">
            <text:p/>
          </draw:line>
        </draw:g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custom-shape draw:style-name="gr7" draw:text-style-name="P6" draw:layer="layout" svg:width="2.019cm" svg:height="1.932cm" svg:x="13.758cm" svg:y="5.513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6" draw:layer="layout" svg:width="1.619cm" svg:height="1.618cm" svg:x="17.165cm" svg:y="5.624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2.42949831877611) translate (20.617cm 7.382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8" draw:text-style-name="P6" draw:layer="layout" svg:width="1.566cm" svg:height="1.741cm" svg:x="7.661cm" svg:y="5.567cm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8" draw:layer="layout" svg:width="1.689cm" svg:height="1.689cm" svg:x="10.985cm" svg:y="5.6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2.019cm" svg:height="1.932cm" svg:x="8.273cm" svg:y="9.534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8" draw:layer="layout" svg:width="1.689cm" svg:height="1.689cm" svg:x="19.876cm" svg:y="9.466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17.172cm" svg:y="9.37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2.039cm" svg:y="9.465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4.952cm" svg:y="9.37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22.845cm" svg:y="5.22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22.94cm" svg:y="9.751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3" draw:layer="layout" svg:width="2.874cm" svg:height="1.673cm" svg:x="2.037cm" svg:y="3.693cm">
          <draw:text-box>
            <text:p text:style-name="P12">oldest</text:p>
          </draw:text-box>
        </draw:frame>
        <draw:frame draw:style-name="gr32" draw:text-style-name="P14" draw:layer="layout" svg:width="3.116cm" svg:height="1.673cm" svg:x="22.727cm" svg:y="12.405cm">
          <draw:text-box>
            <text:p>Newest</text:p>
          </draw:text-box>
        </draw:frame>
        <draw:custom-shape draw:style-name="gr33" draw:text-style-name="P15" draw:layer="layout" svg:width="2.268cm" svg:height="3.96cm" svg:x="1.805cm" svg:y="4.49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019cm" svg:height="1.932cm" svg:x="9.801cm" svg:y="0.545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6" draw:layer="layout" svg:width="1.881cm" svg:height="1.376cm" svg:x="15.238cm" svg:y="0.875cm">
          <text:p/>
          <draw:enhanced-geometry svg:viewBox="0 0 21600 21600" draw:mirror-horizontal="false" draw:mirror-vertical="false" draw:text-areas="?f0 ?f7 ?f2 21600" draw:type="up-arrow" draw:modifiers="10650.9803921569 5531.265716680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-2.40942703237817) translate (14.689cm 1.664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7" draw:text-style-name="P6" draw:layer="layout" svg:width="2.019cm" svg:height="1.932cm" svg:x="1.805cm" svg:y="5.546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8" draw:layer="layout" svg:width="1.689cm" svg:height="1.689cm" svg:x="4.848cm" svg:y="5.654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566cm" svg:height="1.741cm" draw:transform="rotate (-2.40942703237817) translate (13.262cm 10.58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6" draw:layer="layout" svg:width="1.881cm" svg:height="1.376cm" svg:x="13.678cm" svg:y="9.659cm">
          <text:p/>
          <draw:enhanced-geometry svg:viewBox="0 0 21600 21600" draw:mirror-horizontal="false" draw:mirror-vertical="false" draw:text-areas="?f0 ?f7 ?f2 21600" draw:type="up-arrow" draw:modifiers="10650.9803921569 5531.265716680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33" draw:text-style-name="P15" draw:layer="layout" svg:width="2.268cm" svg:height="3.96cm" svg:x="10.889cm" svg:y="8.45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2.268cm" svg:height="3.96cm" svg:x="13.358cm" svg:y="8.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6" draw:layer="layout" svg:width="3.588cm" svg:height="3.282cm" svg:x="1.121cm" svg:y="8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5" draw:layer="layout" svg:width="2.268cm" svg:height="3.96cm" svg:x="10.889cm" svg:y="8.451cm">
          <text:p/>
          <draw:enhanced-geometry svg:viewBox="0 0 21600 21600" draw:type="rectangle" draw:enhanced-path="M 0 0 L 21600 0 21600 21600 0 21600 0 0 Z N"/>
        </draw:custom-shape>
        <draw:g draw:style-name="gr5">
          <draw:line draw:style-name="gr35" draw:text-style-name="P17" draw:layer="layout" svg:x1="9.954cm" svg:y1="1.018cm" svg:x2="10.762cm" svg:y2="1.96cm">
            <text:p/>
          </draw:line>
          <draw:line draw:style-name="gr35" draw:text-style-name="P17" draw:layer="layout" svg:x1="10.404cm" svg:y1="1.933cm" svg:x2="11.88cm" svg:y2="0.763cm">
            <text:p/>
          </draw:line>
        </draw:g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custom-shape draw:style-name="gr7" draw:text-style-name="P6" draw:layer="layout" svg:width="2.019cm" svg:height="1.932cm" svg:x="13.758cm" svg:y="5.513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6" draw:layer="layout" svg:width="1.619cm" svg:height="1.618cm" svg:x="17.165cm" svg:y="5.624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2.42949831877611) translate (20.617cm 7.382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8" draw:text-style-name="P6" draw:layer="layout" svg:width="1.566cm" svg:height="1.741cm" svg:x="7.661cm" svg:y="5.567cm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8" draw:layer="layout" svg:width="1.689cm" svg:height="1.689cm" svg:x="10.985cm" svg:y="5.6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2.019cm" svg:height="1.932cm" svg:x="8.273cm" svg:y="9.534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8" draw:layer="layout" svg:width="1.689cm" svg:height="1.689cm" svg:x="19.876cm" svg:y="9.466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17.172cm" svg:y="9.37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2.039cm" svg:y="9.465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4.952cm" svg:y="9.37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22.845cm" svg:y="5.22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22.94cm" svg:y="9.751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3" draw:layer="layout" svg:width="2.874cm" svg:height="1.673cm" svg:x="2.037cm" svg:y="3.693cm">
          <draw:text-box>
            <text:p text:style-name="P12">oldest</text:p>
          </draw:text-box>
        </draw:frame>
        <draw:frame draw:style-name="gr32" draw:text-style-name="P14" draw:layer="layout" svg:width="3.116cm" svg:height="1.673cm" svg:x="22.727cm" svg:y="12.405cm">
          <draw:text-box>
            <text:p>Newest</text:p>
          </draw:text-box>
        </draw:frame>
        <draw:custom-shape draw:style-name="gr33" draw:text-style-name="P15" draw:layer="layout" svg:width="2.268cm" svg:height="3.96cm" svg:x="1.805cm" svg:y="4.49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019cm" svg:height="1.932cm" svg:x="9.801cm" svg:y="0.545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6" draw:layer="layout" svg:width="1.881cm" svg:height="1.376cm" svg:x="15.238cm" svg:y="0.875cm">
          <text:p/>
          <draw:enhanced-geometry svg:viewBox="0 0 21600 21600" draw:mirror-horizontal="false" draw:mirror-vertical="false" draw:text-areas="?f0 ?f7 ?f2 21600" draw:type="up-arrow" draw:modifiers="10650.9803921569 5531.265716680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-2.40942703237817) translate (14.689cm 1.664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7" draw:text-style-name="P6" draw:layer="layout" svg:width="2.019cm" svg:height="1.932cm" svg:x="1.805cm" svg:y="5.546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8" draw:layer="layout" svg:width="1.689cm" svg:height="1.689cm" svg:x="4.848cm" svg:y="5.654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566cm" svg:height="1.741cm" draw:transform="rotate (-2.40942703237817) translate (13.262cm 10.58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6" draw:layer="layout" svg:width="1.881cm" svg:height="1.376cm" svg:x="13.678cm" svg:y="9.659cm">
          <text:p/>
          <draw:enhanced-geometry svg:viewBox="0 0 21600 21600" draw:mirror-horizontal="false" draw:mirror-vertical="false" draw:text-areas="?f0 ?f7 ?f2 21600" draw:type="up-arrow" draw:modifiers="10650.9803921569 5531.265716680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33" draw:text-style-name="P15" draw:layer="layout" svg:width="2.268cm" svg:height="3.96cm" svg:x="10.889cm" svg:y="8.45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2.268cm" svg:height="3.96cm" svg:x="13.358cm" svg:y="8.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6" draw:layer="layout" svg:width="3.588cm" svg:height="3.282cm" svg:x="4.046cm" svg:y="8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5" draw:layer="layout" svg:width="2.268cm" svg:height="3.96cm" svg:x="10.889cm" svg:y="8.451cm">
          <text:p/>
          <draw:enhanced-geometry svg:viewBox="0 0 21600 21600" draw:type="rectangle" draw:enhanced-path="M 0 0 L 21600 0 21600 21600 0 21600 0 0 Z N"/>
        </draw:custom-shape>
        <draw:g draw:style-name="gr5">
          <draw:line draw:style-name="gr35" draw:text-style-name="P17" draw:layer="layout" svg:x1="9.954cm" svg:y1="1.018cm" svg:x2="10.762cm" svg:y2="1.96cm">
            <text:p/>
          </draw:line>
          <draw:line draw:style-name="gr35" draw:text-style-name="P17" draw:layer="layout" svg:x1="10.404cm" svg:y1="1.933cm" svg:x2="11.88cm" svg:y2="0.763cm">
            <text:p/>
          </draw:line>
        </draw:g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custom-shape draw:style-name="gr7" draw:text-style-name="P6" draw:layer="layout" svg:width="2.019cm" svg:height="1.932cm" svg:x="13.758cm" svg:y="5.513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6" draw:layer="layout" svg:width="1.619cm" svg:height="1.618cm" svg:x="17.165cm" svg:y="5.624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2.42949831877611) translate (20.617cm 7.382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8" draw:text-style-name="P6" draw:layer="layout" svg:width="1.566cm" svg:height="1.741cm" svg:x="7.661cm" svg:y="5.567cm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8" draw:layer="layout" svg:width="1.689cm" svg:height="1.689cm" svg:x="10.985cm" svg:y="5.6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2.019cm" svg:height="1.932cm" svg:x="8.273cm" svg:y="9.534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8" draw:layer="layout" svg:width="1.689cm" svg:height="1.689cm" svg:x="19.876cm" svg:y="9.466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17.172cm" svg:y="9.37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2.039cm" svg:y="9.465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4.952cm" svg:y="9.37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22.845cm" svg:y="5.22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22.94cm" svg:y="9.751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3" draw:layer="layout" svg:width="2.874cm" svg:height="1.673cm" svg:x="2.037cm" svg:y="3.693cm">
          <draw:text-box>
            <text:p text:style-name="P12">oldest</text:p>
          </draw:text-box>
        </draw:frame>
        <draw:frame draw:style-name="gr32" draw:text-style-name="P14" draw:layer="layout" svg:width="3.116cm" svg:height="1.673cm" svg:x="22.727cm" svg:y="12.405cm">
          <draw:text-box>
            <text:p>Newest</text:p>
          </draw:text-box>
        </draw:frame>
        <draw:custom-shape draw:style-name="gr33" draw:text-style-name="P15" draw:layer="layout" svg:width="2.268cm" svg:height="3.96cm" svg:x="1.805cm" svg:y="4.49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019cm" svg:height="1.932cm" svg:x="9.801cm" svg:y="0.545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6" draw:layer="layout" svg:width="1.881cm" svg:height="1.376cm" svg:x="15.238cm" svg:y="0.875cm">
          <text:p/>
          <draw:enhanced-geometry svg:viewBox="0 0 21600 21600" draw:mirror-horizontal="false" draw:mirror-vertical="false" draw:text-areas="?f0 ?f7 ?f2 21600" draw:type="up-arrow" draw:modifiers="10650.9803921569 5531.265716680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-2.40942703237817) translate (14.689cm 1.664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7" draw:text-style-name="P6" draw:layer="layout" svg:width="2.019cm" svg:height="1.932cm" svg:x="1.805cm" svg:y="5.546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8" draw:layer="layout" svg:width="1.689cm" svg:height="1.689cm" svg:x="4.848cm" svg:y="5.654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566cm" svg:height="1.741cm" draw:transform="rotate (-2.40942703237817) translate (13.262cm 10.58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6" draw:layer="layout" svg:width="1.881cm" svg:height="1.376cm" svg:x="13.678cm" svg:y="9.659cm">
          <text:p/>
          <draw:enhanced-geometry svg:viewBox="0 0 21600 21600" draw:mirror-horizontal="false" draw:mirror-vertical="false" draw:text-areas="?f0 ?f7 ?f2 21600" draw:type="up-arrow" draw:modifiers="10650.9803921569 5531.265716680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33" draw:text-style-name="P15" draw:layer="layout" svg:width="2.268cm" svg:height="3.96cm" svg:x="10.889cm" svg:y="8.45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2.268cm" svg:height="3.96cm" svg:x="13.358cm" svg:y="8.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6" draw:layer="layout" svg:width="3.588cm" svg:height="3.282cm" svg:x="7.455cm" svg:y="8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5" draw:layer="layout" svg:width="2.268cm" svg:height="3.96cm" svg:x="10.889cm" svg:y="8.451cm">
          <text:p/>
          <draw:enhanced-geometry svg:viewBox="0 0 21600 21600" draw:type="rectangle" draw:enhanced-path="M 0 0 L 21600 0 21600 21600 0 21600 0 0 Z N"/>
        </draw:custom-shape>
        <draw:g draw:style-name="gr5">
          <draw:line draw:style-name="gr35" draw:text-style-name="P17" draw:layer="layout" svg:x1="9.954cm" svg:y1="1.018cm" svg:x2="10.762cm" svg:y2="1.96cm">
            <text:p/>
          </draw:line>
          <draw:line draw:style-name="gr35" draw:text-style-name="P17" draw:layer="layout" svg:x1="10.404cm" svg:y1="1.933cm" svg:x2="11.88cm" svg:y2="0.763cm">
            <text:p/>
          </draw:line>
        </draw:g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custom-shape draw:style-name="gr7" draw:text-style-name="P6" draw:layer="layout" svg:width="2.019cm" svg:height="1.932cm" svg:x="13.758cm" svg:y="5.513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6" draw:layer="layout" svg:width="1.619cm" svg:height="1.618cm" svg:x="17.165cm" svg:y="5.624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2.42949831877611) translate (20.617cm 7.382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8" draw:text-style-name="P6" draw:layer="layout" svg:width="1.566cm" svg:height="1.741cm" svg:x="7.661cm" svg:y="5.567cm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8" draw:layer="layout" svg:width="1.689cm" svg:height="1.689cm" svg:x="10.985cm" svg:y="5.6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2.019cm" svg:height="1.932cm" svg:x="8.273cm" svg:y="9.534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8" draw:layer="layout" svg:width="1.689cm" svg:height="1.689cm" svg:x="19.876cm" svg:y="9.466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17.172cm" svg:y="9.37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2.039cm" svg:y="9.465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4.952cm" svg:y="9.37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22.845cm" svg:y="5.22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22.94cm" svg:y="9.751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3" draw:layer="layout" svg:width="2.874cm" svg:height="1.673cm" svg:x="2.037cm" svg:y="3.693cm">
          <draw:text-box>
            <text:p text:style-name="P12">oldest</text:p>
          </draw:text-box>
        </draw:frame>
        <draw:frame draw:style-name="gr32" draw:text-style-name="P14" draw:layer="layout" svg:width="3.116cm" svg:height="1.673cm" svg:x="22.727cm" svg:y="12.405cm">
          <draw:text-box>
            <text:p>Newest</text:p>
          </draw:text-box>
        </draw:frame>
        <draw:custom-shape draw:style-name="gr33" draw:text-style-name="P15" draw:layer="layout" svg:width="2.268cm" svg:height="3.96cm" svg:x="1.805cm" svg:y="4.49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6" draw:layer="layout" svg:width="2.019cm" svg:height="1.932cm" svg:x="9.801cm" svg:y="0.545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6" draw:layer="layout" svg:width="1.881cm" svg:height="1.376cm" svg:x="15.238cm" svg:y="0.875cm">
          <text:p/>
          <draw:enhanced-geometry svg:viewBox="0 0 21600 21600" draw:mirror-horizontal="false" draw:mirror-vertical="false" draw:text-areas="?f0 ?f7 ?f2 21600" draw:type="up-arrow" draw:modifiers="10650.9803921569 5531.265716680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-2.40942703237817) translate (14.689cm 1.664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7" draw:text-style-name="P6" draw:layer="layout" svg:width="2.019cm" svg:height="1.932cm" svg:x="1.805cm" svg:y="5.546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8" draw:layer="layout" svg:width="1.689cm" svg:height="1.689cm" svg:x="4.848cm" svg:y="5.654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566cm" svg:height="1.741cm" draw:transform="rotate (-2.40942703237817) translate (13.262cm 10.58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6" draw:layer="layout" svg:width="1.881cm" svg:height="1.376cm" svg:x="13.678cm" svg:y="9.659cm">
          <text:p/>
          <draw:enhanced-geometry svg:viewBox="0 0 21600 21600" draw:mirror-horizontal="false" draw:mirror-vertical="false" draw:text-areas="?f0 ?f7 ?f2 21600" draw:type="up-arrow" draw:modifiers="10650.9803921569 5531.265716680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33" draw:text-style-name="P15" draw:layer="layout" svg:width="2.268cm" svg:height="3.96cm" svg:x="10.889cm" svg:y="8.45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2.268cm" svg:height="3.96cm" svg:x="13.358cm" svg:y="8.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6" draw:layer="layout" svg:width="3.588cm" svg:height="3.282cm" svg:x="10.075cm" svg:y="8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5" draw:layer="layout" svg:width="2.268cm" svg:height="3.96cm" svg:x="10.889cm" svg:y="8.451cm">
          <text:p/>
          <draw:enhanced-geometry svg:viewBox="0 0 21600 21600" draw:type="rectangle" draw:enhanced-path="M 0 0 L 21600 0 21600 21600 0 21600 0 0 Z N"/>
        </draw:custom-shape>
        <draw:g draw:style-name="gr5">
          <draw:line draw:style-name="gr35" draw:text-style-name="P17" draw:layer="layout" svg:x1="9.954cm" svg:y1="1.017cm" svg:x2="10.762cm" svg:y2="1.959cm">
            <text:p/>
          </draw:line>
          <draw:line draw:style-name="gr35" draw:text-style-name="P17" draw:layer="layout" svg:x1="10.404cm" svg:y1="1.932cm" svg:x2="11.88cm" svg:y2="0.762cm">
            <text:p/>
          </draw:line>
        </draw:g>
        <draw:g draw:style-name="gr5">
          <draw:line draw:style-name="gr35" draw:text-style-name="P17" draw:layer="layout" svg:x1="12.6cm" svg:y1="1.069cm" svg:x2="13.408cm" svg:y2="2.011cm">
            <text:p/>
          </draw:line>
          <draw:line draw:style-name="gr35" draw:text-style-name="P17" draw:layer="layout" svg:x1="13.05cm" svg:y1="1.984cm" svg:x2="14.526cm" svg:y2="0.814cm">
            <text:p/>
          </draw:line>
        </draw:g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custom-shape draw:style-name="gr7" draw:text-style-name="P6" draw:layer="layout" svg:width="2.019cm" svg:height="1.932cm" svg:x="13.758cm" svg:y="5.513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6" draw:layer="layout" svg:width="1.619cm" svg:height="1.618cm" svg:x="17.165cm" svg:y="5.624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2.42949831877611) translate (20.617cm 7.382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8" draw:text-style-name="P6" draw:layer="layout" svg:width="1.566cm" svg:height="1.741cm" svg:x="7.661cm" svg:y="5.567cm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8" draw:layer="layout" svg:width="1.689cm" svg:height="1.689cm" svg:x="10.985cm" svg:y="5.6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2.019cm" svg:height="1.932cm" svg:x="8.273cm" svg:y="9.534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8" draw:layer="layout" svg:width="1.689cm" svg:height="1.689cm" svg:x="19.876cm" svg:y="9.466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17.172cm" svg:y="9.37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2.039cm" svg:y="9.465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4.952cm" svg:y="9.37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22.845cm" svg:y="5.22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22.94cm" svg:y="9.751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3" draw:layer="layout" svg:width="2.874cm" svg:height="1.673cm" svg:x="2.037cm" svg:y="3.693cm">
          <draw:text-box>
            <text:p text:style-name="P12">oldest</text:p>
          </draw:text-box>
        </draw:frame>
        <draw:frame draw:style-name="gr32" draw:text-style-name="P14" draw:layer="layout" svg:width="3.116cm" svg:height="1.673cm" svg:x="22.727cm" svg:y="12.405cm">
          <draw:text-box>
            <text:p>Newest</text:p>
          </draw:text-box>
        </draw:frame>
        <draw:custom-shape draw:style-name="gr33" draw:text-style-name="P15" draw:layer="layout" svg:width="2.268cm" svg:height="3.96cm" svg:x="1.805cm" svg:y="4.49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6" draw:layer="layout" svg:width="2.019cm" svg:height="1.932cm" svg:x="9.801cm" svg:y="0.545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6" draw:layer="layout" svg:width="1.881cm" svg:height="1.376cm" svg:x="15.238cm" svg:y="0.875cm">
          <text:p/>
          <draw:enhanced-geometry svg:viewBox="0 0 21600 21600" draw:mirror-horizontal="false" draw:mirror-vertical="false" draw:text-areas="?f0 ?f7 ?f2 21600" draw:type="up-arrow" draw:modifiers="10650.9803921569 5531.265716680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-2.40942703237817) translate (14.689cm 1.664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7" draw:text-style-name="P6" draw:layer="layout" svg:width="2.019cm" svg:height="1.932cm" svg:x="1.805cm" svg:y="5.546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8" draw:layer="layout" svg:width="1.689cm" svg:height="1.689cm" svg:x="4.848cm" svg:y="5.654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566cm" svg:height="1.741cm" draw:transform="rotate (-2.40942703237817) translate (13.262cm 10.58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6" draw:layer="layout" svg:width="1.881cm" svg:height="1.376cm" svg:x="13.678cm" svg:y="9.659cm">
          <text:p/>
          <draw:enhanced-geometry svg:viewBox="0 0 21600 21600" draw:mirror-horizontal="false" draw:mirror-vertical="false" draw:text-areas="?f0 ?f7 ?f2 21600" draw:type="up-arrow" draw:modifiers="10650.9803921569 5531.265716680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33" draw:text-style-name="P15" draw:layer="layout" svg:width="2.268cm" svg:height="3.96cm" svg:x="10.889cm" svg:y="8.45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2.268cm" svg:height="3.96cm" svg:x="13.358cm" svg:y="8.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6" draw:layer="layout" svg:width="3.588cm" svg:height="3.282cm" svg:x="12.747cm" svg:y="8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5" draw:layer="layout" svg:width="2.268cm" svg:height="3.96cm" svg:x="10.889cm" svg:y="8.451cm">
          <text:p/>
          <draw:enhanced-geometry svg:viewBox="0 0 21600 21600" draw:type="rectangle" draw:enhanced-path="M 0 0 L 21600 0 21600 21600 0 21600 0 0 Z N"/>
        </draw:custom-shape>
        <draw:g draw:style-name="gr5">
          <draw:line draw:style-name="gr35" draw:text-style-name="P17" draw:layer="layout" svg:x1="9.954cm" svg:y1="1.017cm" svg:x2="10.762cm" svg:y2="1.959cm">
            <text:p/>
          </draw:line>
          <draw:line draw:style-name="gr35" draw:text-style-name="P17" draw:layer="layout" svg:x1="10.404cm" svg:y1="1.932cm" svg:x2="11.88cm" svg:y2="0.762cm">
            <text:p/>
          </draw:line>
        </draw:g>
        <draw:g draw:style-name="gr5">
          <draw:line draw:style-name="gr35" draw:text-style-name="P17" draw:layer="layout" svg:x1="12.6cm" svg:y1="1.069cm" svg:x2="13.408cm" svg:y2="2.011cm">
            <text:p/>
          </draw:line>
          <draw:line draw:style-name="gr35" draw:text-style-name="P17" draw:layer="layout" svg:x1="13.05cm" svg:y1="1.984cm" svg:x2="14.526cm" svg:y2="0.814cm">
            <text:p/>
          </draw:line>
        </draw:g>
        <draw:g draw:style-name="gr5">
          <draw:line draw:style-name="gr35" draw:text-style-name="P17" draw:layer="layout" svg:x1="15.475cm" svg:y1="1.13cm" svg:x2="16.283cm" svg:y2="2.072cm">
            <text:p/>
          </draw:line>
          <draw:line draw:style-name="gr35" draw:text-style-name="P17" draw:layer="layout" svg:x1="15.925cm" svg:y1="2.045cm" svg:x2="17.401cm" svg:y2="0.875cm">
            <text:p/>
          </draw:line>
        </draw:g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custom-shape draw:style-name="gr7" draw:text-style-name="P6" draw:layer="layout" svg:width="2.019cm" svg:height="1.932cm" svg:x="13.758cm" svg:y="5.513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6" draw:layer="layout" svg:width="1.619cm" svg:height="1.618cm" svg:x="17.165cm" svg:y="5.624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2.42949831877611) translate (20.617cm 7.382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8" draw:text-style-name="P6" draw:layer="layout" svg:width="1.566cm" svg:height="1.741cm" svg:x="7.661cm" svg:y="5.567cm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8" draw:layer="layout" svg:width="1.689cm" svg:height="1.689cm" svg:x="10.985cm" svg:y="5.6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2.019cm" svg:height="1.932cm" svg:x="8.273cm" svg:y="9.534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8" draw:layer="layout" svg:width="1.689cm" svg:height="1.689cm" svg:x="19.876cm" svg:y="9.466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17.172cm" svg:y="9.37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2.039cm" svg:y="9.465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4.952cm" svg:y="9.37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22.845cm" svg:y="5.22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22.94cm" svg:y="9.751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8" draw:layer="layout" svg:width="2.874cm" svg:height="1.673cm" svg:x="2.037cm" svg:y="3.693cm">
          <draw:text-box>
            <text:p text:style-name="P12"><text:span text:style-name="T1">oldest</text:span></text:p>
          </draw:text-box>
        </draw:frame>
        <draw:frame draw:style-name="gr32" draw:text-style-name="P19" draw:layer="layout" svg:width="3.116cm" svg:height="1.673cm" svg:x="22.727cm" svg:y="12.405cm">
          <draw:text-box>
            <text:p><text:span text:style-name="T1">Newest</text:span></text:p>
          </draw:text-box>
        </draw:frame>
        <draw:frame draw:style-name="gr37" draw:text-style-name="P18" draw:layer="layout" svg:width="6.643cm" svg:height="2.986cm" svg:x="2.209cm" svg:y="0.459cm">
          <draw:text-box>
            <text:p text:style-name="P12"><text:span text:style-name="T1">Then whitch comes first fqcu or dqcf </text:span></text:p>
          </draw:text-box>
        </draw:frame>
        <draw:custom-shape draw:style-name="gr7" draw:text-style-name="P6" draw:layer="layout" svg:width="2.019cm" svg:height="1.932cm" svg:x="9.801cm" svg:y="0.545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6" draw:layer="layout" svg:width="1.881cm" svg:height="1.376cm" svg:x="15.238cm" svg:y="0.875cm">
          <text:p/>
          <draw:enhanced-geometry svg:viewBox="0 0 21600 21600" draw:mirror-horizontal="false" draw:mirror-vertical="false" draw:text-areas="?f0 ?f7 ?f2 21600" draw:type="up-arrow" draw:modifiers="10650.9803921569 5531.265716680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-2.40942703237817) translate (14.689cm 1.664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7" draw:text-style-name="P6" draw:layer="layout" svg:width="2.019cm" svg:height="1.932cm" svg:x="1.805cm" svg:y="5.546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8" draw:layer="layout" svg:width="1.689cm" svg:height="1.689cm" svg:x="4.848cm" svg:y="5.654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566cm" svg:height="1.741cm" draw:transform="rotate (-2.40942703237817) translate (13.262cm 10.58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6" draw:layer="layout" svg:width="1.881cm" svg:height="1.376cm" svg:x="13.678cm" svg:y="9.659cm">
          <text:p/>
          <draw:enhanced-geometry svg:viewBox="0 0 21600 21600" draw:mirror-horizontal="false" draw:mirror-vertical="false" draw:text-areas="?f0 ?f7 ?f2 21600" draw:type="up-arrow" draw:modifiers="10650.9803921569 5531.265716680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9" draw:text-style-name="P6" draw:layer="layout" svg:width="1.619cm" svg:height="1.618cm" svg:x="1.556cm" svg:y="13.059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2.42949831877611) translate (4.452cm 14.871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7" draw:text-style-name="P6" draw:layer="layout" svg:width="2.019cm" svg:height="1.932cm" svg:x="5.628cm" svg:y="12.63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6" draw:layer="layout" svg:width="1.619cm" svg:height="1.618cm" svg:x="20.11cm" svg:y="1.18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2.42949831877611) translate (23.006cm 2.992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7" draw:text-style-name="P6" draw:layer="layout" svg:width="2.019cm" svg:height="1.932cm" svg:x="24.182cm" svg:y="0.751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38" draw:text-style-name="P9" draw:layer="layout" svg:width="1.067cm" svg:height="0.962cm" svg:x="17.674cm" svg:y="1.35cm">
          <draw:text-box>
            <text:p><text:span text:style-name="T1">or</text:span></text:p>
          </draw:text-box>
        </draw:frame>
        <draw:custom-shape draw:style-name="gr39" draw:text-style-name="P3" draw:layer="layout" svg:width="20.602cm" svg:height="1.932cm" svg:x="2.037cm" svg:y="2.559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custom-shape draw:style-name="gr7" draw:text-style-name="P6" draw:layer="layout" svg:width="2.019cm" svg:height="1.932cm" svg:x="13.758cm" svg:y="5.513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6" draw:layer="layout" svg:width="1.619cm" svg:height="1.618cm" svg:x="17.165cm" svg:y="5.624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2.42949831877611) translate (20.617cm 7.382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8" draw:text-style-name="P6" draw:layer="layout" svg:width="1.566cm" svg:height="1.741cm" svg:x="7.661cm" svg:y="5.567cm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8" draw:layer="layout" svg:width="1.689cm" svg:height="1.689cm" svg:x="10.985cm" svg:y="5.6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2.019cm" svg:height="1.932cm" svg:x="8.273cm" svg:y="9.534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8" draw:layer="layout" svg:width="1.689cm" svg:height="1.689cm" svg:x="19.876cm" svg:y="9.466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17.172cm" svg:y="9.37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2.039cm" svg:y="9.465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4.952cm" svg:y="9.37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22.845cm" svg:y="5.22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22.94cm" svg:y="9.751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8" draw:layer="layout" svg:width="2.874cm" svg:height="1.673cm" svg:x="2.037cm" svg:y="3.693cm">
          <draw:text-box>
            <text:p text:style-name="P12"><text:span text:style-name="T1">oldest</text:span></text:p>
          </draw:text-box>
        </draw:frame>
        <draw:frame draw:style-name="gr32" draw:text-style-name="P19" draw:layer="layout" svg:width="3.116cm" svg:height="1.673cm" svg:x="22.727cm" svg:y="12.405cm">
          <draw:text-box>
            <text:p><text:span text:style-name="T1">Newest</text:span></text:p>
          </draw:text-box>
        </draw:frame>
        <draw:frame draw:style-name="gr40" draw:text-style-name="P18" draw:layer="layout" svg:width="6.643cm" svg:height="2.986cm" svg:x="2.209cm" svg:y="0.459cm">
          <draw:text-box>
            <text:p text:style-name="P12"><text:span text:style-name="T1">Then whitch comes first fqcu or dqcf </text:span></text:p>
          </draw:text-box>
        </draw:frame>
        <draw:custom-shape draw:style-name="gr7" draw:text-style-name="P6" draw:layer="layout" svg:width="2.019cm" svg:height="1.932cm" svg:x="9.801cm" svg:y="0.545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6" draw:layer="layout" svg:width="1.881cm" svg:height="1.376cm" svg:x="15.238cm" svg:y="0.875cm">
          <text:p/>
          <draw:enhanced-geometry svg:viewBox="0 0 21600 21600" draw:mirror-horizontal="false" draw:mirror-vertical="false" draw:text-areas="?f0 ?f7 ?f2 21600" draw:type="up-arrow" draw:modifiers="10650.9803921569 5531.265716680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-2.40942703237817) translate (14.689cm 1.664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7" draw:text-style-name="P6" draw:layer="layout" svg:width="2.019cm" svg:height="1.932cm" svg:x="1.805cm" svg:y="5.546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8" draw:layer="layout" svg:width="1.689cm" svg:height="1.689cm" svg:x="4.848cm" svg:y="5.654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566cm" svg:height="1.741cm" draw:transform="rotate (-2.40942703237817) translate (13.262cm 10.58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6" draw:layer="layout" svg:width="1.881cm" svg:height="1.376cm" svg:x="13.678cm" svg:y="9.659cm">
          <text:p/>
          <draw:enhanced-geometry svg:viewBox="0 0 21600 21600" draw:mirror-horizontal="false" draw:mirror-vertical="false" draw:text-areas="?f0 ?f7 ?f2 21600" draw:type="up-arrow" draw:modifiers="10650.9803921569 5531.265716680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9" draw:text-style-name="P6" draw:layer="layout" svg:width="1.619cm" svg:height="1.618cm" svg:x="1.556cm" svg:y="13.059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2.42949831877611) translate (4.452cm 14.871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7" draw:text-style-name="P6" draw:layer="layout" svg:width="2.019cm" svg:height="1.932cm" svg:x="5.628cm" svg:y="12.63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6" draw:layer="layout" svg:width="1.619cm" svg:height="1.618cm" svg:x="20.11cm" svg:y="1.18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2.42949831877611) translate (23.006cm 2.992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7" draw:text-style-name="P6" draw:layer="layout" svg:width="2.019cm" svg:height="1.932cm" svg:x="24.182cm" svg:y="0.751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38" draw:text-style-name="P9" draw:layer="layout" svg:width="1.067cm" svg:height="0.962cm" svg:x="17.674cm" svg:y="1.35cm">
          <draw:text-box>
            <text:p><text:span text:style-name="T1">or</text:span></text:p>
          </draw:text-box>
        </draw:frame>
        <draw:custom-shape draw:style-name="gr39" draw:text-style-name="P3" draw:layer="layout" svg:width="20.602cm" svg:height="1.932cm" svg:x="2.037cm" svg:y="2.559cm">
          <text:p/>
          <draw:enhanced-geometry svg:viewBox="0 0 21600 21600" draw:mirror-horizontal="tru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custom-shape draw:style-name="gr7" draw:text-style-name="P6" draw:layer="layout" svg:width="2.019cm" svg:height="1.932cm" svg:x="13.758cm" svg:y="5.513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6" draw:layer="layout" svg:width="1.619cm" svg:height="1.618cm" svg:x="17.165cm" svg:y="5.624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2.42949831877611) translate (20.617cm 7.382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8" draw:text-style-name="P6" draw:layer="layout" svg:width="1.566cm" svg:height="1.741cm" svg:x="7.661cm" svg:y="5.567cm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8" draw:layer="layout" svg:width="1.689cm" svg:height="1.689cm" svg:x="10.985cm" svg:y="5.6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2.019cm" svg:height="1.932cm" svg:x="8.273cm" svg:y="9.534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8" draw:layer="layout" svg:width="1.689cm" svg:height="1.689cm" svg:x="19.876cm" svg:y="9.466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17.172cm" svg:y="9.37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2.039cm" svg:y="9.465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4.952cm" svg:y="9.37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22.845cm" svg:y="5.22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22.94cm" svg:y="9.751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8" draw:layer="layout" svg:width="2.874cm" svg:height="1.673cm" svg:x="2.037cm" svg:y="3.693cm">
          <draw:text-box>
            <text:p text:style-name="P12"><text:span text:style-name="T1">oldest</text:span></text:p>
          </draw:text-box>
        </draw:frame>
        <draw:frame draw:style-name="gr32" draw:text-style-name="P19" draw:layer="layout" svg:width="3.116cm" svg:height="1.673cm" svg:x="22.727cm" svg:y="12.405cm">
          <draw:text-box>
            <text:p><text:span text:style-name="T1">Newest</text:span></text:p>
          </draw:text-box>
        </draw:frame>
        <draw:frame draw:style-name="gr41" draw:text-style-name="P18" draw:layer="layout" svg:width="6.643cm" svg:height="2.986cm" svg:x="2.209cm" svg:y="0.459cm">
          <draw:text-box>
            <text:p text:style-name="P12"><text:span text:style-name="T1">Then whitch comes first fqcu or dqcf </text:span></text:p>
          </draw:text-box>
        </draw:frame>
        <draw:custom-shape draw:style-name="gr7" draw:text-style-name="P6" draw:layer="layout" svg:width="2.019cm" svg:height="1.932cm" svg:x="9.801cm" svg:y="0.545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6" draw:layer="layout" svg:width="1.881cm" svg:height="1.376cm" svg:x="15.238cm" svg:y="0.875cm">
          <text:p/>
          <draw:enhanced-geometry svg:viewBox="0 0 21600 21600" draw:mirror-horizontal="false" draw:mirror-vertical="false" draw:text-areas="?f0 ?f7 ?f2 21600" draw:type="up-arrow" draw:modifiers="10650.9803921569 5531.265716680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-2.40942703237817) translate (14.689cm 1.664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7" draw:text-style-name="P6" draw:layer="layout" svg:width="2.019cm" svg:height="1.932cm" svg:x="1.805cm" svg:y="5.546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8" draw:layer="layout" svg:width="1.689cm" svg:height="1.689cm" svg:x="4.848cm" svg:y="5.654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566cm" svg:height="1.741cm" draw:transform="rotate (-2.40942703237817) translate (13.262cm 10.58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6" draw:layer="layout" svg:width="1.881cm" svg:height="1.376cm" svg:x="13.678cm" svg:y="9.659cm">
          <text:p/>
          <draw:enhanced-geometry svg:viewBox="0 0 21600 21600" draw:mirror-horizontal="false" draw:mirror-vertical="false" draw:text-areas="?f0 ?f7 ?f2 21600" draw:type="up-arrow" draw:modifiers="10650.9803921569 5531.265716680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9" draw:text-style-name="P6" draw:layer="layout" svg:width="1.619cm" svg:height="1.618cm" svg:x="1.556cm" svg:y="13.059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2.42949831877611) translate (4.452cm 14.871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7" draw:text-style-name="P6" draw:layer="layout" svg:width="2.019cm" svg:height="1.932cm" svg:x="5.628cm" svg:y="12.63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6" draw:layer="layout" svg:width="1.619cm" svg:height="1.618cm" svg:x="20.11cm" svg:y="1.18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2.42949831877611) translate (23.006cm 2.992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7" draw:text-style-name="P6" draw:layer="layout" svg:width="2.019cm" svg:height="1.932cm" svg:x="24.182cm" svg:y="0.751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38" draw:text-style-name="P9" draw:layer="layout" svg:width="1.067cm" svg:height="0.962cm" svg:x="17.674cm" svg:y="1.35cm">
          <draw:text-box>
            <text:p><text:span text:style-name="T1">or</text:span></text:p>
          </draw:text-box>
        </draw:frame>
        <draw:custom-shape draw:style-name="gr39" draw:text-style-name="P3" draw:layer="layout" svg:width="20.602cm" svg:height="1.932cm" svg:x="2.037cm" svg:y="2.559cm">
          <text:p/>
          <draw:enhanced-geometry svg:viewBox="0 0 21600 21600" draw:mirror-horizontal="tru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42" draw:text-style-name="P15" draw:layer="layout" svg:width="6.759cm" svg:height="3.96cm" svg:x="1.086cm" svg:y="11.51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7.594cm" svg:height="3.96cm" svg:x="8.119cm" svg:y="8.2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custom-shape draw:style-name="gr7" draw:text-style-name="P6" draw:layer="layout" svg:width="2.019cm" svg:height="1.932cm" svg:x="13.758cm" svg:y="3.179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6" draw:layer="layout" svg:width="1.619cm" svg:height="1.618cm" svg:x="17.165cm" svg:y="3.29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2.42949831877611) translate (20.617cm 5.048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8" draw:text-style-name="P6" draw:layer="layout" svg:width="1.566cm" svg:height="1.741cm" svg:x="7.661cm" svg:y="3.233cm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8" draw:layer="layout" svg:width="1.689cm" svg:height="1.689cm" svg:x="10.985cm" svg:y="3.266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2.019cm" svg:height="1.932cm" svg:x="8.273cm" svg:y="7.2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8" draw:layer="layout" svg:width="1.689cm" svg:height="1.689cm" svg:x="19.876cm" svg:y="7.132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17.172cm" svg:y="7.036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2.039cm" svg:y="7.131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4.952cm" svg:y="7.036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22.845cm" svg:y="2.886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22.94cm" svg:y="7.417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8" draw:layer="layout" svg:width="2.874cm" svg:height="1.673cm" svg:x="2.037cm" svg:y="1.359cm">
          <draw:text-box>
            <text:p text:style-name="P12"><text:span text:style-name="T1">oldest</text:span></text:p>
          </draw:text-box>
        </draw:frame>
        <draw:frame draw:style-name="gr32" draw:text-style-name="P19" draw:layer="layout" svg:width="3.116cm" svg:height="1.673cm" svg:x="24.884cm" svg:y="14.077cm">
          <draw:text-box>
            <text:p><text:span text:style-name="T1">Newest</text:span></text:p>
          </draw:text-box>
        </draw:frame>
        <draw:custom-shape draw:style-name="gr7" draw:text-style-name="P6" draw:layer="layout" svg:width="2.019cm" svg:height="1.932cm" svg:x="1.805cm" svg:y="3.212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8" draw:layer="layout" svg:width="1.689cm" svg:height="1.689cm" svg:x="4.848cm" svg:y="3.32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566cm" svg:height="1.741cm" draw:transform="rotate (-2.40942703237817) translate (13.262cm 8.246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6" draw:layer="layout" svg:width="1.881cm" svg:height="1.376cm" svg:x="13.678cm" svg:y="7.325cm">
          <text:p/>
          <draw:enhanced-geometry svg:viewBox="0 0 21600 21600" draw:mirror-horizontal="false" draw:mirror-vertical="false" draw:text-areas="?f0 ?f7 ?f2 21600" draw:type="up-arrow" draw:modifiers="10650.9803921569 5531.265716680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9" draw:text-style-name="P6" draw:layer="layout" svg:width="1.619cm" svg:height="1.618cm" svg:x="1.556cm" svg:y="10.725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2.42949831877611) translate (4.452cm 12.537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7" draw:text-style-name="P6" draw:layer="layout" svg:width="2.019cm" svg:height="1.932cm" svg:x="5.628cm" svg:y="10.296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7" draw:text-style-name="P6" draw:layer="layout" svg:width="2.019cm" svg:height="1.932cm" svg:x="8.097cm" svg:y="10.162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7" draw:text-style-name="P6" draw:layer="layout" svg:width="2.019cm" svg:height="1.932cm" svg:x="11.143cm" svg:y="9.416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3" draw:text-style-name="P3" draw:layer="layout" svg:width="2.909cm" svg:height="2.83cm" svg:x="10.473cm" svg:y="11.476cm">
          <draw:image xlink:href="Pictures/100000000000006E0000006B0DF23044.png" xlink:type="simple" xlink:show="embed" xlink:actuate="onLoad" draw:mime-type="image/png">
            <text:p/>
          </draw:image>
        </draw:frame>
        <draw:custom-shape draw:style-name="gr44" draw:text-style-name="P15" draw:layer="layout" svg:width="13.445cm" svg:height="5.756cm" svg:x="1.007cm" svg:y="9.26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3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custom-shape draw:style-name="gr7" draw:text-style-name="P6" draw:layer="layout" svg:width="2.019cm" svg:height="1.932cm" svg:x="13.758cm" svg:y="3.179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6" draw:layer="layout" svg:width="1.619cm" svg:height="1.618cm" svg:x="17.165cm" svg:y="3.29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2.42949831877611) translate (20.617cm 5.048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8" draw:text-style-name="P6" draw:layer="layout" svg:width="1.566cm" svg:height="1.741cm" svg:x="7.661cm" svg:y="3.233cm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8" draw:layer="layout" svg:width="1.689cm" svg:height="1.689cm" svg:x="10.985cm" svg:y="3.266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2.019cm" svg:height="1.932cm" svg:x="8.273cm" svg:y="7.2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8" draw:layer="layout" svg:width="1.689cm" svg:height="1.689cm" svg:x="19.876cm" svg:y="7.132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17.172cm" svg:y="7.036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2.039cm" svg:y="7.131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4.952cm" svg:y="7.036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22.845cm" svg:y="2.886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22.94cm" svg:y="7.417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8" draw:layer="layout" svg:width="2.874cm" svg:height="1.673cm" svg:x="2.037cm" svg:y="1.359cm">
          <draw:text-box>
            <text:p text:style-name="P12"><text:span text:style-name="T1">oldest</text:span></text:p>
          </draw:text-box>
        </draw:frame>
        <draw:frame draw:style-name="gr32" draw:text-style-name="P19" draw:layer="layout" svg:width="3.116cm" svg:height="1.673cm" svg:x="24.884cm" svg:y="14.077cm">
          <draw:text-box>
            <text:p><text:span text:style-name="T1">Newest</text:span></text:p>
          </draw:text-box>
        </draw:frame>
        <draw:custom-shape draw:style-name="gr7" draw:text-style-name="P6" draw:layer="layout" svg:width="2.019cm" svg:height="1.932cm" svg:x="1.805cm" svg:y="3.212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8" draw:layer="layout" svg:width="1.689cm" svg:height="1.689cm" svg:x="4.848cm" svg:y="3.32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566cm" svg:height="1.741cm" draw:transform="rotate (-2.40942703237817) translate (13.262cm 8.246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6" draw:layer="layout" svg:width="1.881cm" svg:height="1.376cm" svg:x="13.678cm" svg:y="7.325cm">
          <text:p/>
          <draw:enhanced-geometry svg:viewBox="0 0 21600 21600" draw:mirror-horizontal="false" draw:mirror-vertical="false" draw:text-areas="?f0 ?f7 ?f2 21600" draw:type="up-arrow" draw:modifiers="10650.9803921569 5531.265716680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9" draw:text-style-name="P6" draw:layer="layout" svg:width="1.619cm" svg:height="1.618cm" svg:x="1.556cm" svg:y="10.725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2.42949831877611) translate (4.452cm 12.537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7" draw:text-style-name="P6" draw:layer="layout" svg:width="2.019cm" svg:height="1.932cm" svg:x="5.628cm" svg:y="10.296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7" draw:text-style-name="P6" draw:layer="layout" svg:width="2.019cm" svg:height="1.932cm" svg:x="8.097cm" svg:y="10.162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7" draw:text-style-name="P6" draw:layer="layout" svg:width="2.019cm" svg:height="1.932cm" svg:x="11.143cm" svg:y="9.416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3" draw:text-style-name="P3" draw:layer="layout" svg:width="2.909cm" svg:height="2.83cm" svg:x="10.473cm" svg:y="11.476cm">
          <draw:image xlink:href="Pictures/100000000000006E0000006B0DF23044.png" xlink:type="simple" xlink:show="embed" xlink:actuate="onLoad" draw:mime-type="image/png">
            <text:p/>
          </draw:image>
        </draw:frame>
        <draw:custom-shape draw:style-name="gr44" draw:text-style-name="P15" draw:layer="layout" svg:width="13.445cm" svg:height="5.756cm" svg:x="1.007cm" svg:y="9.26cm">
          <text:p/>
          <draw:enhanced-geometry svg:viewBox="0 0 21600 21600" draw:type="rectangle" draw:enhanced-path="M 0 0 L 21600 0 21600 21600 0 21600 0 0 Z N"/>
        </draw:custom-shape>
        <draw:frame draw:style-name="gr32" draw:text-style-name="P19" draw:layer="layout" svg:width="3.116cm" svg:height="1.673cm" svg:x="14.722cm" svg:y="11.45cm">
          <draw:text-box>
            <text:p><text:span text:style-name="T1">Buffered history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3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custom-shape draw:style-name="gr7" draw:text-style-name="P6" draw:layer="layout" svg:width="2.019cm" svg:height="1.932cm" svg:x="5.321cm" svg:y="6.696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6" draw:layer="layout" svg:width="1.881cm" svg:height="1.376cm" svg:x="7.645cm" svg:y="6.737cm">
          <text:p/>
          <draw:enhanced-geometry svg:viewBox="0 0 21600 21600" draw:mirror-horizontal="false" draw:mirror-vertical="false" draw:text-areas="?f0 ?f7 ?f2 21600" draw:type="up-arrow" draw:modifiers="10650.9803921569 5531.265716680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-2.40942703237817) translate (14.478cm 7.904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6" draw:layer="layout" svg:width="1.619cm" svg:height="1.618cm" svg:x="3.001cm" svg:y="6.997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2.42949831877611) translate (15.236cm 9.009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7" draw:text-style-name="P6" draw:layer="layout" svg:width="2.019cm" svg:height="1.932cm" svg:x="10.12cm" svg:y="6.746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45" draw:text-style-name="P13" draw:layer="layout" svg:width="12.297cm" svg:height="0.962cm" svg:x="9.795cm" svg:y="4.306cm">
          <draw:text-box>
            <text:p>@ index 6 <text:tab/><text:tab/><text:tab/><text:tab/><text:tab/>@ index 0 </text:p>
          </draw:text-box>
        </draw:frame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custom-shape draw:style-name="gr7" draw:text-style-name="P6" draw:layer="layout" svg:width="2.019cm" svg:height="1.932cm" svg:x="5.321cm" svg:y="6.696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6" draw:layer="layout" svg:width="1.881cm" svg:height="1.376cm" svg:x="10.758cm" svg:y="7.026cm">
          <text:p/>
          <draw:enhanced-geometry svg:viewBox="0 0 21600 21600" draw:mirror-horizontal="false" draw:mirror-vertical="false" draw:text-areas="?f0 ?f7 ?f2 21600" draw:type="up-arrow" draw:modifiers="10650.9803921569 5531.265716680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-2.40942703237817) translate (10.209cm 7.815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6" draw:layer="layout" svg:width="1.619cm" svg:height="1.618cm" svg:x="15.63cm" svg:y="7.331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2.42949831877611) translate (18.526cm 9.143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7" draw:text-style-name="P6" draw:layer="layout" svg:width="2.019cm" svg:height="1.932cm" svg:x="19.702cm" svg:y="6.902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45" draw:text-style-name="P13" draw:layer="layout" svg:width="12.297cm" svg:height="0.962cm" svg:x="9.795cm" svg:y="4.306cm">
          <draw:text-box>
            <text:p>@ index 6 <text:tab/><text:tab/><text:tab/><text:tab/><text:tab/>@ index 0 </text:p>
          </draw:text-box>
        </draw:frame>
        <draw:custom-shape draw:style-name="gr46" draw:text-style-name="P15" draw:layer="layout" svg:width="8.313cm" svg:height="5.756cm" svg:x="14.502cm" svg:y="3.4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custom-shape draw:style-name="gr36" draw:text-style-name="P6" draw:layer="layout" svg:width="2.019cm" svg:height="1.932cm" svg:x="5.879cm" svg:y="6.068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6" draw:layer="layout" svg:width="1.881cm" svg:height="1.376cm" svg:x="11.316cm" svg:y="6.398cm">
          <text:p/>
          <draw:enhanced-geometry svg:viewBox="0 0 21600 21600" draw:mirror-horizontal="false" draw:mirror-vertical="false" draw:text-areas="?f0 ?f7 ?f2 21600" draw:type="up-arrow" draw:modifiers="10650.9803921569 5531.265716680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-2.40942703237817) translate (10.767cm 7.187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g draw:style-name="gr5">
          <draw:line draw:style-name="gr35" draw:text-style-name="P17" draw:layer="layout" svg:x1="6.032cm" svg:y1="6.54cm" svg:x2="6.84cm" svg:y2="7.482cm">
            <text:p/>
          </draw:line>
          <draw:line draw:style-name="gr35" draw:text-style-name="P17" draw:layer="layout" svg:x1="6.482cm" svg:y1="7.455cm" svg:x2="7.958cm" svg:y2="6.285cm">
            <text:p/>
          </draw:line>
        </draw:g>
        <draw:g draw:style-name="gr5">
          <draw:line draw:style-name="gr35" draw:text-style-name="P17" draw:layer="layout" svg:x1="8.678cm" svg:y1="6.592cm" svg:x2="9.486cm" svg:y2="7.534cm">
            <text:p/>
          </draw:line>
          <draw:line draw:style-name="gr35" draw:text-style-name="P17" draw:layer="layout" svg:x1="9.128cm" svg:y1="7.507cm" svg:x2="10.604cm" svg:y2="6.337cm">
            <text:p/>
          </draw:line>
        </draw:g>
        <draw:g draw:style-name="gr5">
          <draw:line draw:style-name="gr35" draw:text-style-name="P17" draw:layer="layout" svg:x1="11.553cm" svg:y1="6.653cm" svg:x2="12.361cm" svg:y2="7.595cm">
            <text:p/>
          </draw:line>
          <draw:line draw:style-name="gr35" draw:text-style-name="P17" draw:layer="layout" svg:x1="12.003cm" svg:y1="7.568cm" svg:x2="13.479cm" svg:y2="6.398cm">
            <text:p/>
          </draw:line>
        </draw:g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custom-shape draw:style-name="gr36" draw:text-style-name="P6" draw:layer="layout" svg:width="2.019cm" svg:height="1.932cm" svg:x="5.879cm" svg:y="6.068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6" draw:layer="layout" svg:width="1.881cm" svg:height="1.376cm" svg:x="11.316cm" svg:y="6.398cm">
          <text:p/>
          <draw:enhanced-geometry svg:viewBox="0 0 21600 21600" draw:mirror-horizontal="false" draw:mirror-vertical="false" draw:text-areas="?f0 ?f7 ?f2 21600" draw:type="up-arrow" draw:modifiers="10650.9803921569 5531.265716680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-2.40942703237817) translate (10.767cm 7.187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g draw:style-name="gr5">
          <draw:line draw:style-name="gr35" draw:text-style-name="P17" draw:layer="layout" svg:x1="6.032cm" svg:y1="6.54cm" svg:x2="6.84cm" svg:y2="7.482cm">
            <text:p/>
          </draw:line>
          <draw:line draw:style-name="gr35" draw:text-style-name="P17" draw:layer="layout" svg:x1="6.482cm" svg:y1="7.455cm" svg:x2="7.958cm" svg:y2="6.285cm">
            <text:p/>
          </draw:line>
        </draw:g>
        <draw:g draw:style-name="gr5">
          <draw:line draw:style-name="gr35" draw:text-style-name="P17" draw:layer="layout" svg:x1="8.678cm" svg:y1="6.592cm" svg:x2="9.486cm" svg:y2="7.534cm">
            <text:p/>
          </draw:line>
          <draw:line draw:style-name="gr35" draw:text-style-name="P17" draw:layer="layout" svg:x1="9.128cm" svg:y1="7.507cm" svg:x2="10.604cm" svg:y2="6.337cm">
            <text:p/>
          </draw:line>
        </draw:g>
        <draw:g draw:style-name="gr5">
          <draw:line draw:style-name="gr35" draw:text-style-name="P17" draw:layer="layout" svg:x1="11.553cm" svg:y1="6.653cm" svg:x2="12.361cm" svg:y2="7.595cm">
            <text:p/>
          </draw:line>
          <draw:line draw:style-name="gr35" draw:text-style-name="P17" draw:layer="layout" svg:x1="12.003cm" svg:y1="7.568cm" svg:x2="13.479cm" svg:y2="6.398cm">
            <text:p/>
          </draw:line>
        </draw:g>
        <draw:frame draw:style-name="gr3" draw:text-style-name="P3" draw:layer="layout" svg:width="2.909cm" svg:height="2.83cm" svg:x="17.683cm" svg:y="5.679cm">
          <draw:image xlink:href="Pictures/100000000000006E0000006B0DF23044.png" xlink:type="simple" xlink:show="embed" xlink:actuate="onLoad" draw:mime-type="image/png">
            <text:p/>
          </draw:image>
        </draw:frame>
        <draw:custom-shape draw:style-name="gr14" draw:text-style-name="P6" draw:layer="layout" svg:width="2.315cm" svg:height="2.298cm" svg:x="14.664cm" svg:y="6.0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075.5426917510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4" draw:text-style-name="P6" draw:layer="layout" svg:width="2.315cm" svg:height="2.298cm" svg:x="21.21cm" svg:y="6.22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075.5426917510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7" draw:text-style-name="P6" draw:layer="layout" svg:width="0.464cm" svg:height="0.418cm" svg:x="25.483cm" svg:y="7.86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6" draw:layer="layout" svg:width="0.464cm" svg:height="0.418cm" svg:x="24.555cm" svg:y="7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6" draw:layer="layout" svg:width="0.464cm" svg:height="0.418cm" svg:x="25.019cm" svg:y="7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When using append</text:p>
          </draw:text-box>
        </draw:frame>
        <draw:custom-shape draw:style-name="gr48" draw:text-style-name="P21" draw:layer="layout" svg:width="3.757cm" svg:height="2.725cm" svg:x="19.817cm" svg:y="7.039cm">
          <text:p text:style-name="P20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3.308cm" svg:height="3.149cm" svg:x="3.889cm" svg:y="5.37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range-y-minimum="14510" draw:handle-range-y-maximum="18520" draw:handle-position="10800 $0" draw:handle-position-x="10800" draw:handle-position-y="$0"/>
          </draw:enhanced-geometry>
        </draw:custom-shape>
        <draw:line draw:style-name="gr50" draw:text-style-name="P1" draw:layer="layout" svg:x1="7.197cm" svg:y1="6.933cm" svg:x2="19.817cm" svg:y2="8.494cm">
          <text:p/>
        </draw:line>
        <draw:custom-shape draw:style-name="gr49" draw:text-style-name="P6" draw:layer="layout" svg:width="3.308cm" svg:height="3.149cm" svg:x="3.915cm" svg:y="9.47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range-y-minimum="14510" draw:handle-range-y-maximum="18520" draw:handle-position="10800 $0" draw:handle-position-x="10800" draw:handle-position-y="$0"/>
          </draw:enhanced-geometry>
        </draw:custom-shape>
        <draw:line draw:style-name="gr51" draw:text-style-name="P1" draw:layer="layout" svg:x1="7.223cm" svg:y1="11.086cm" svg:x2="19.817cm" svg:y2="8.494cm">
          <text:p/>
        </draw:line>
        <presentation:notes draw:style-name="dp2">
          <draw:page-thumbnail draw:style-name="gr2" draw:layer="layout" svg:width="19.798cm" svg:height="11.136cm" svg:x="0.6cm" svg:y="2.257cm" draw:page-number="4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 text:style-name="P6">When using append</text:p>
          </draw:text-box>
        </draw:frame>
        <draw:custom-shape draw:style-name="gr49" draw:text-style-name="P6" draw:layer="layout" svg:width="3.308cm" svg:height="3.149cm" svg:x="3.889cm" svg:y="5.37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range-y-minimum="14510" draw:handle-range-y-maximum="18520" draw:handle-position="10800 $0" draw:handle-position-x="10800" draw:handle-position-y="$0"/>
          </draw:enhanced-geometry>
        </draw:custom-shape>
        <draw:line draw:style-name="gr50" draw:text-style-name="P1" draw:layer="layout" svg:x1="7.197cm" svg:y1="6.933cm" svg:x2="19.817cm" svg:y2="8.494cm">
          <text:p/>
        </draw:line>
        <draw:custom-shape draw:style-name="gr49" draw:text-style-name="P6" draw:layer="layout" svg:width="3.308cm" svg:height="3.149cm" svg:x="3.915cm" svg:y="9.47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range-y-minimum="14510" draw:handle-range-y-maximum="18520" draw:handle-position="10800 $0" draw:handle-position-x="10800" draw:handle-position-y="$0"/>
          </draw:enhanced-geometry>
        </draw:custom-shape>
        <draw:line draw:style-name="gr51" draw:text-style-name="P1" draw:layer="layout" svg:x1="7.223cm" svg:y1="11.086cm" svg:x2="19.817cm" svg:y2="8.494cm">
          <text:p/>
        </draw:line>
        <draw:custom-shape draw:style-name="gr48" draw:text-style-name="P21" draw:layer="layout" svg:width="3.757cm" svg:height="2.725cm" svg:x="19.818cm" svg:y="7.04cm">
          <text:p text:style-name="P20"><text:span text:style-name="T2">5</text:span></text:p>
          <draw:enhanced-geometry svg:viewBox="0 0 21600 21600" draw:type="rectangle" draw:enhanced-path="M 0 0 L 21600 0 21600 21600 0 21600 0 0 Z N"/>
        </draw:custom-shape>
        <draw:frame draw:style-name="gr52" draw:text-style-name="P10" draw:layer="layout" svg:width="1.484cm" svg:height="2.22cm" svg:x="1.455cm" svg:y="5.954cm">
          <draw:text-box>
            <text:p><text:span text:style-name="T2">5</text:span></text:p>
          </draw:text-box>
        </draw:frame>
        <draw:frame draw:style-name="gr52" draw:text-style-name="P10" draw:layer="layout" svg:width="1.484cm" svg:height="2.22cm" svg:x="1.482cm" svg:y="10.875cm">
          <draw:text-box>
            <text:p><text:span text:style-name="T2">5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 text:style-name="P6">When using append</text:p>
          </draw:text-box>
        </draw:frame>
        <draw:custom-shape draw:style-name="gr48" draw:text-style-name="P21" draw:layer="layout" svg:width="3.757cm" svg:height="2.725cm" svg:x="19.817cm" svg:y="7.039cm">
          <text:p text:style-name="P20"><text:span text:style-name="T2">99</text:span></text:p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3.308cm" svg:height="3.149cm" svg:x="3.889cm" svg:y="5.37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range-y-minimum="14510" draw:handle-range-y-maximum="18520" draw:handle-position="10800 $0" draw:handle-position-x="10800" draw:handle-position-y="$0"/>
          </draw:enhanced-geometry>
        </draw:custom-shape>
        <draw:line draw:style-name="gr50" draw:text-style-name="P1" draw:layer="layout" svg:x1="7.197cm" svg:y1="6.933cm" svg:x2="19.817cm" svg:y2="8.494cm">
          <text:p/>
        </draw:line>
        <draw:custom-shape draw:style-name="gr49" draw:text-style-name="P6" draw:layer="layout" svg:width="3.308cm" svg:height="3.149cm" svg:x="3.915cm" svg:y="9.47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range-y-minimum="14510" draw:handle-range-y-maximum="18520" draw:handle-position="10800 $0" draw:handle-position-x="10800" draw:handle-position-y="$0"/>
          </draw:enhanced-geometry>
        </draw:custom-shape>
        <draw:line draw:style-name="gr51" draw:text-style-name="P1" draw:layer="layout" svg:x1="7.223cm" svg:y1="11.086cm" svg:x2="19.817cm" svg:y2="8.494cm">
          <text:p/>
        </draw:line>
        <draw:frame draw:style-name="gr52" draw:text-style-name="P10" draw:layer="layout" svg:width="1.484cm" svg:height="2.22cm" svg:x="1.455cm" svg:y="5.954cm">
          <draw:text-box>
            <text:p><text:span text:style-name="T2">5</text:span></text:p>
          </draw:text-box>
        </draw:frame>
        <draw:frame draw:style-name="gr52" draw:text-style-name="P10" draw:layer="layout" svg:width="1.484cm" svg:height="2.22cm" svg:x="1.482cm" svg:y="10.875cm">
          <draw:text-box>
            <text:p><text:span text:style-name="T2">5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 text:style-name="P6">When using append</text:p>
          </draw:text-box>
        </draw:frame>
        <draw:custom-shape draw:style-name="gr48" draw:text-style-name="P21" draw:layer="layout" svg:width="3.757cm" svg:height="2.725cm" svg:x="19.817cm" svg:y="7.039cm">
          <text:p text:style-name="P20"><text:span text:style-name="T2">99</text:span></text:p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3.308cm" svg:height="3.149cm" svg:x="3.889cm" svg:y="5.37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range-y-minimum="14510" draw:handle-range-y-maximum="18520" draw:handle-position="10800 $0" draw:handle-position-x="10800" draw:handle-position-y="$0"/>
          </draw:enhanced-geometry>
        </draw:custom-shape>
        <draw:line draw:style-name="gr50" draw:text-style-name="P1" draw:layer="layout" svg:x1="7.197cm" svg:y1="6.933cm" svg:x2="19.817cm" svg:y2="8.494cm">
          <text:p/>
        </draw:line>
        <draw:custom-shape draw:style-name="gr49" draw:text-style-name="P6" draw:layer="layout" svg:width="3.308cm" svg:height="3.149cm" svg:x="3.915cm" svg:y="9.47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range-y-minimum="14510" draw:handle-range-y-maximum="18520" draw:handle-position="10800 $0" draw:handle-position-x="10800" draw:handle-position-y="$0"/>
          </draw:enhanced-geometry>
        </draw:custom-shape>
        <draw:line draw:style-name="gr51" draw:text-style-name="P1" draw:layer="layout" svg:x1="7.223cm" svg:y1="11.086cm" svg:x2="19.817cm" svg:y2="8.494cm">
          <text:p/>
        </draw:line>
        <draw:frame draw:style-name="gr53" draw:text-style-name="P10" draw:layer="layout" svg:width="2.466cm" svg:height="2.22cm" svg:x="1.455cm" svg:y="5.954cm">
          <draw:text-box>
            <text:p><text:span text:style-name="T2">99</text:span></text:p>
          </draw:text-box>
        </draw:frame>
        <draw:frame draw:style-name="gr53" draw:text-style-name="P10" draw:layer="layout" svg:width="2.466cm" svg:height="2.22cm" svg:x="1.482cm" svg:y="10.875cm">
          <draw:text-box>
            <text:p><text:span text:style-name="T2">99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 text:style-name="P6">When using append and duplicate</text:p>
          </draw:text-box>
        </draw:frame>
        <draw:custom-shape draw:style-name="gr48" draw:text-style-name="P22" draw:layer="layout" svg:width="3.757cm" svg:height="2.725cm" svg:x="19.817cm" svg:y="9.447cm">
          <text:p text:style-name="P6">5</text:p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3.308cm" svg:height="3.149cm" svg:x="3.889cm" svg:y="5.37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range-y-minimum="14510" draw:handle-range-y-maximum="18520" draw:handle-position="10800 $0" draw:handle-position-x="10800" draw:handle-position-y="$0"/>
          </draw:enhanced-geometry>
        </draw:custom-shape>
        <draw:line draw:style-name="gr50" draw:text-style-name="P1" draw:layer="layout" svg:x1="7.197cm" svg:y1="6.933cm" svg:x2="19.817cm" svg:y2="6.271cm">
          <text:p/>
        </draw:line>
        <draw:custom-shape draw:style-name="gr49" draw:text-style-name="P6" draw:layer="layout" svg:width="3.308cm" svg:height="3.149cm" svg:x="3.915cm" svg:y="9.47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range-y-minimum="14510" draw:handle-range-y-maximum="18520" draw:handle-position="10800 $0" draw:handle-position-x="10800" draw:handle-position-y="$0"/>
          </draw:enhanced-geometry>
        </draw:custom-shape>
        <draw:line draw:style-name="gr51" draw:text-style-name="P1" draw:layer="layout" svg:x1="7.223cm" svg:y1="11.086cm" svg:x2="19.817cm" svg:y2="10.928cm">
          <text:p/>
        </draw:line>
        <draw:custom-shape draw:style-name="gr48" draw:text-style-name="P22" draw:layer="layout" svg:width="3.757cm" svg:height="2.725cm" svg:x="19.817cm" svg:y="4.71cm">
          <text:p text:style-name="P6">5</text:p>
          <draw:enhanced-geometry svg:viewBox="0 0 21600 21600" draw:type="rectangle" draw:enhanced-path="M 0 0 L 21600 0 21600 21600 0 21600 0 0 Z N"/>
        </draw:custom-shape>
        <draw:frame draw:style-name="gr52" draw:text-style-name="P10" draw:layer="layout" svg:width="1.484cm" svg:height="2.22cm" svg:x="1.482cm" svg:y="10.875cm">
          <draw:text-box>
            <text:p><text:span text:style-name="T2">5</text:span></text:p>
          </draw:text-box>
        </draw:frame>
        <draw:frame draw:style-name="gr52" draw:text-style-name="P10" draw:layer="layout" svg:width="1.484cm" svg:height="2.22cm" svg:x="1.455cm" svg:y="5.954cm">
          <draw:text-box>
            <text:p><text:span text:style-name="T2">5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 text:style-name="P6">When using append and duplicate</text:p>
          </draw:text-box>
        </draw:frame>
        <draw:custom-shape draw:style-name="gr48" draw:text-style-name="P22" draw:layer="layout" svg:width="3.757cm" svg:height="2.725cm" svg:x="19.817cm" svg:y="9.447cm">
          <text:p text:style-name="P6">99</text:p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3.308cm" svg:height="3.149cm" svg:x="3.889cm" svg:y="5.37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range-y-minimum="14510" draw:handle-range-y-maximum="18520" draw:handle-position="10800 $0" draw:handle-position-x="10800" draw:handle-position-y="$0"/>
          </draw:enhanced-geometry>
        </draw:custom-shape>
        <draw:line draw:style-name="gr50" draw:text-style-name="P1" draw:layer="layout" svg:x1="7.197cm" svg:y1="6.933cm" svg:x2="19.817cm" svg:y2="6.271cm">
          <text:p/>
        </draw:line>
        <draw:custom-shape draw:style-name="gr49" draw:text-style-name="P6" draw:layer="layout" svg:width="3.308cm" svg:height="3.149cm" svg:x="3.915cm" svg:y="9.47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range-y-minimum="14510" draw:handle-range-y-maximum="18520" draw:handle-position="10800 $0" draw:handle-position-x="10800" draw:handle-position-y="$0"/>
          </draw:enhanced-geometry>
        </draw:custom-shape>
        <draw:line draw:style-name="gr51" draw:text-style-name="P1" draw:layer="layout" svg:x1="7.223cm" svg:y1="11.086cm" svg:x2="19.817cm" svg:y2="10.928cm">
          <text:p/>
        </draw:line>
        <draw:custom-shape draw:style-name="gr48" draw:text-style-name="P22" draw:layer="layout" svg:width="3.757cm" svg:height="2.725cm" svg:x="19.817cm" svg:y="4.71cm">
          <text:p text:style-name="P6">5</text:p>
          <draw:enhanced-geometry svg:viewBox="0 0 21600 21600" draw:type="rectangle" draw:enhanced-path="M 0 0 L 21600 0 21600 21600 0 21600 0 0 Z N"/>
        </draw:custom-shape>
        <draw:frame draw:style-name="gr52" draw:text-style-name="P10" draw:layer="layout" svg:width="1.484cm" svg:height="2.22cm" svg:x="1.482cm" svg:y="10.875cm">
          <draw:text-box>
            <text:p><text:span text:style-name="T2">5</text:span></text:p>
          </draw:text-box>
        </draw:frame>
        <draw:frame draw:style-name="gr52" draw:text-style-name="P10" draw:layer="layout" svg:width="1.484cm" svg:height="2.22cm" svg:x="1.455cm" svg:y="5.954cm">
          <draw:text-box>
            <text:p><text:span text:style-name="T2">5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 text:style-name="P6">When using append and duplicate</text:p>
          </draw:text-box>
        </draw:frame>
        <draw:custom-shape draw:style-name="gr48" draw:text-style-name="P22" draw:layer="layout" svg:width="3.757cm" svg:height="2.725cm" svg:x="19.817cm" svg:y="9.447cm">
          <text:p text:style-name="P6">99</text:p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3.308cm" svg:height="3.149cm" svg:x="3.889cm" svg:y="5.37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range-y-minimum="14510" draw:handle-range-y-maximum="18520" draw:handle-position="10800 $0" draw:handle-position-x="10800" draw:handle-position-y="$0"/>
          </draw:enhanced-geometry>
        </draw:custom-shape>
        <draw:line draw:style-name="gr50" draw:text-style-name="P1" draw:layer="layout" svg:x1="7.197cm" svg:y1="6.933cm" svg:x2="19.817cm" svg:y2="6.271cm">
          <text:p/>
        </draw:line>
        <draw:custom-shape draw:style-name="gr49" draw:text-style-name="P6" draw:layer="layout" svg:width="3.308cm" svg:height="3.149cm" svg:x="3.915cm" svg:y="9.47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range-y-minimum="14510" draw:handle-range-y-maximum="18520" draw:handle-position="10800 $0" draw:handle-position-x="10800" draw:handle-position-y="$0"/>
          </draw:enhanced-geometry>
        </draw:custom-shape>
        <draw:line draw:style-name="gr51" draw:text-style-name="P1" draw:layer="layout" svg:x1="7.223cm" svg:y1="11.086cm" svg:x2="19.817cm" svg:y2="10.928cm">
          <text:p/>
        </draw:line>
        <draw:custom-shape draw:style-name="gr48" draw:text-style-name="P22" draw:layer="layout" svg:width="3.757cm" svg:height="2.725cm" svg:x="19.817cm" svg:y="4.71cm">
          <text:p text:style-name="P6">5</text:p>
          <draw:enhanced-geometry svg:viewBox="0 0 21600 21600" draw:type="rectangle" draw:enhanced-path="M 0 0 L 21600 0 21600 21600 0 21600 0 0 Z N"/>
        </draw:custom-shape>
        <draw:frame draw:style-name="gr53" draw:text-style-name="P10" draw:layer="layout" svg:width="2.466cm" svg:height="2.22cm" svg:x="1.482cm" svg:y="10.875cm">
          <draw:text-box>
            <text:p><text:span text:style-name="T2">99</text:span></text:p>
          </draw:text-box>
        </draw:frame>
        <draw:frame draw:style-name="gr52" draw:text-style-name="P10" draw:layer="layout" svg:width="1.484cm" svg:height="2.22cm" svg:x="1.455cm" svg:y="5.954cm">
          <draw:text-box>
            <text:p><text:span text:style-name="T2">5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solid" draw:fill-color="#800080"/>
      <style:paragraph-properties loext:tab-stop-distance="0cm"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fill="solid" draw:fill-color="#000000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7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7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9T21:17:20.095993390</meta:creation-date>
    <dc:date>2026-05-29T17:34:59.447155640</dc:date>
    <meta:editing-duration>PT6H52M30S</meta:editing-duration>
    <meta:editing-cycles>11</meta:editing-cycles>
    <meta:generator>LibreOffice/26.2.3.2$Linux_X86_64 LibreOffice_project/d4d5ed47b6084125f28d269a5650105d54dde034</meta:generator>
    <meta:document-statistic meta:object-count="887"/>
  </office:meta>
</office:document-meta>
</file>