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2000001E419BA7414.png" manifest:media-type="image/png"/>
  <manifest:file-entry manifest:full-path="Pictures/10000001000002B000000083CE8259E4.png" manifest:media-type="image/png"/>
  <manifest:file-entry manifest:full-path="Pictures/100000010000006900000067EE585D43.png" manifest:media-type="image/png"/>
  <manifest:file-entry manifest:full-path="Pictures/100000000000006E0000006B0DF23044.png" manifest:media-type="image/png"/>
  <manifest:file-entry manifest:full-path="Pictures/100000010000033500000225D0DDC2C2.png" manifest:media-type="image/png"/>
  <manifest:file-entry manifest:full-path="Pictures/10000000000001790000016A6B543D83.png" manifest:media-type="image/png"/>
  <manifest:file-entry manifest:full-path="Pictures/1000000000000069000000670C489800.png" manifest:media-type="image/png"/>
  <manifest:file-entry manifest:full-path="Pictures/1000000000000088000000862D9EE71B.png" manifest:media-type="image/png"/>
  <manifest:file-entry manifest:full-path="Pictures/100000010000006E0000006B5201AA84.png" manifest:media-type="image/png"/>
  <manifest:file-entry manifest:full-path="Pictures/100000000000006900000067659E7CB6.png" manifest:media-type="image/png"/>
  <manifest:file-entry manifest:full-path="Pictures/100000000000006E0000006BB829D614.png" manifest:media-type="image/png"/>
  <manifest:file-entry manifest:full-path="Pictures/100000010000006900000067C4503B3C.png" manifest:media-type="image/png"/>
  <manifest:file-entry manifest:full-path="Pictures/10000000000000880000008680787181.png" manifest:media-type="image/png"/>
  <manifest:file-entry manifest:full-path="Pictures/1000000100000088000000865ABDF3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color="#333333" draw:fill="solid" draw:fill-color="#ffffff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stroke="none" draw:fill="solid" draw:fill-color="#ffffff"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614cm" fo:min-width="1.069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553cm" fo:min-width="0.707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96cm" fo:min-width="0.317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796cm" fo:min-width="0.419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609cm" fo:min-width="0.791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945cm" fo:min-width="0.69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178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5.377cm" fo:min-width="5.183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118cm" fo:min-width="0cm" loext:decorative="false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238cm" fo:min-width="2.459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.202cm" fo:min-width="2.4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08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87cm" fo:min-width="0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61cm" fo:min-width="0.751cm" style:protect="siz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.584cm" fo:min-width="0.75cm" style:protect="size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3.524cm" fo:min-width="3.274cm" style:protect="size" loext:decorative="false"/>
    </style:style>
    <style:style style:name="gr24" style:family="graphic" style:parent-style-name="standard">
      <style:graphic-properties draw:fill="none" draw:fill-color="#000000" loext:fill-use-slide-background="false" draw:textarea-horizontal-align="justify" draw:textarea-vertical-align="middle" draw:auto-grow-height="false" fo:min-height="3.524cm" fo:min-width="3.274cm" style:protect="size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1.518cm" fo:min-width="1.268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36cm" loext:decorative="false"/>
      <style:paragraph-properties style:writing-mode="lr-tb"/>
    </style:style>
    <style:style style:name="gr33" style:family="graphic" style:parent-style-name="standard">
      <style:graphic-properties svg:stroke-color="#ff0000" draw:fill="none" loext:fill-use-slide-background="false" draw:opacity="100%" draw:textarea-horizontal-align="justify" draw:textarea-vertical-align="middle" draw:auto-grow-height="false" fo:min-height="3.71cm" fo:min-width="5.058cm" loext:decorative="false"/>
    </style:style>
    <style:style style:name="gr34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1.768cm" loext:decorative="false"/>
    </style:style>
    <style:style style:name="gr35" style:family="graphic" style:parent-style-name="standard">
      <style:graphic-properties svg:stroke-color="#ff0000" draw:fill="none" loext:fill-use-slide-background="false" draw:opacity="100%" draw:textarea-horizontal-align="justify" draw:textarea-vertical-align="middle" draw:auto-grow-height="false" fo:min-height="3.71cm" fo:min-width="8.997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ff0000" draw:fill="none" loext:fill-use-slide-background="false" draw:opacity="100%" draw:textarea-horizontal-align="justify" draw:textarea-vertical-align="middle" draw:auto-grow-height="false" fo:min-height="3.71cm" fo:min-width="6.446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8.278cm" loext:decorative="false"/>
    </style:style>
    <style:style style:name="gr38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4.655cm" loext:decorative="false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40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2.545cm" loext:decorative="false"/>
    </style:style>
    <style:style style:name="gr41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1.975cm" loext:decorative="false"/>
    </style:style>
    <style:style style:name="gr42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1.632cm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3.4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="solid" draw:fill-color="#ffffff" draw:opacity="0%"/>
      <style:paragraph-properties fo:text-align="center"/>
    </style:style>
    <style:style style:name="P6" style:family="paragraph">
      <style:paragraph-properties fo:text-align="start"/>
      <style:text-properties style:font-name="Liberation Mono" fo:font-size="30pt" style:font-name-asian="Liberation Mono" style:font-size-asian="30pt" style:font-name-complex="Liberation Mono" style:font-size-complex="30pt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font-size="50pt" style:font-size-asian="50pt" style:font-size-complex="50pt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opacity="100%"/>
      <style:paragraph-properties fo:text-align="center"/>
    </style:style>
    <style:style style:name="P19" style:family="paragraph">
      <loext:graphic-properties draw:fill="none" draw:opacity="100%"/>
      <style:paragraph-properties fo:text-align="center"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8pt"/>
    </style:style>
    <style:style style:name="T3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202cm" svg:height="3.465cm" svg:x="4.904cm" svg:y="4.713cm">
          <draw:image xlink:href="Pictures/10000001000002B000000083CE8259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909cm" svg:height="2.83cm" svg:x="2.736cm" svg:y="6.629cm">
          <draw:image xlink:href="Pictures/100000000000006E0000006B0DF23044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42cm" svg:y="9.761cm">
          <draw:image xlink:href="Pictures/100000000000006900000067659E7CB6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82cm" svg:y="3.598cm">
          <draw:image xlink:href="Pictures/1000000000000069000000670C489800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705cm" svg:y="6.669cm">
          <draw:image xlink:href="Pictures/1000000000000088000000862D9EE71B.png" xlink:type="simple" xlink:show="embed" xlink:actuate="onLoad" draw:mime-type="image/png">
            <text:p/>
          </draw:image>
        </draw:frame>
        <draw:frame draw:style-name="gr3" draw:text-style-name="P3" draw:layer="layout" svg:width="9.974cm" svg:height="9.577cm" svg:x="16.051cm" svg:y="3.703cm">
          <draw:image xlink:href="Pictures/10000000000001790000016A6B543D83.png" xlink:type="simple" xlink:show="embed" xlink:actuate="onLoad" draw:mime-type="image/png">
            <text:p/>
          </draw:image>
        </draw:frame>
        <draw:frame draw:style-name="gr4" draw:text-style-name="P4" draw:layer="layout" svg:width="2.909cm" svg:height="2.83cm" svg:x="2.627cm" svg:y="3.436cm">
          <draw:image xlink:href="Pictures/100000000000006E0000006BB829D614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513cm" svg:y="9.794cm">
          <draw:image xlink:href="Pictures/10000000000000880000008680787181.png" xlink:type="simple" xlink:show="embed" xlink:actuate="onLoad" draw:mime-type="image/png">
            <text:p/>
          </draw:image>
        </draw:frame>
        <draw:g draw:style-name="gr5">
          <draw:frame draw:style-name="gr6" draw:text-style-name="P5" draw:layer="layout" svg:width="2.909cm" svg:height="2.83cm" svg:x="2.847cm" svg:y="9.577cm">
            <draw:image xlink:href="Pictures/100000010000006E0000006B5201AA84.png" xlink:type="simple" xlink:show="embed" xlink:actuate="onLoad" draw:mime-type="image/png">
              <text:p/>
            </draw:image>
          </draw:frame>
          <draw:frame draw:style-name="gr6" draw:text-style-name="P5" draw:layer="layout" svg:width="2.777cm" svg:height="2.724cm" svg:x="2.979cm" svg:y="9.683cm">
            <draw:image xlink:href="Pictures/100000010000006900000067C4503B3C.png" xlink:type="simple" xlink:show="embed" xlink:actuate="onLoad" draw:mime-type="image/png">
              <text:p/>
            </draw:image>
          </draw:frame>
        </draw:g>
        <draw:g draw:style-name="gr5">
          <draw:frame draw:style-name="gr6" draw:text-style-name="P5" draw:layer="layout" svg:width="2.546cm" svg:height="2.497cm" svg:x="9.452cm" svg:y="3.589cm">
            <draw:image xlink:href="Pictures/100000010000006900000067EE585D43.png" xlink:type="simple" xlink:show="embed" xlink:actuate="onLoad" draw:mime-type="image/png">
              <text:p/>
            </draw:image>
          </draw:frame>
          <draw:frame draw:style-name="gr6" draw:text-style-name="P5" draw:layer="layout" svg:width="2.534cm" svg:height="2.497cm" svg:x="9.452cm" svg:y="3.589cm">
            <draw:image xlink:href="Pictures/1000000100000088000000865ABDF36A.png" xlink:type="simple" xlink:show="embed" xlink:actuate="onLoad" draw:mime-type="image/png">
              <text:p/>
            </draw:image>
          </draw:frame>
        </draw:g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01cm" svg:y="6.561cm" presentation:class="title" presentation:user-transformed="true">
          <draw:text-box>
            <text:p>Managing <text:s/>inputs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requisite 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1. you know what a fighting game is </text:span></text:p>
              </text:list-item>
              <text:list-item>
                <text:p text:style-name="P6"><text:span text:style-name="T1">2. you may have an interest in coding </text:span><text:span text:style-name="T1">a fighting game</text:span></text:p>
              </text:list-item>
              <text:list-item>
                <text:p text:style-name="P6"><text:span text:style-name="T1">3. you have an input system (this </text:span><text:span text:style-name="T1">video is managing not capturing this </text:span><text:span text:style-name="T1">dat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7" draw:text-style-name="P8" xml:id="id6" draw:id="id6" draw:layer="layout" svg:width="2.019cm" svg:height="1.932cm" svg:x="7.763cm" svg:y="5.36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8" xml:id="id4" draw:id="id4" draw:layer="layout" svg:width="1.566cm" svg:height="1.741cm" svg:x="1.532cm" svg:y="5.58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xml:id="id2" draw:id="id2" draw:layer="layout" svg:width="1.619cm" svg:height="1.618cm" svg:x="4.717cm" svg:y="8.2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0" draw:text-style-name="P8" xml:id="id8" draw:id="id8" draw:layer="layout" svg:width="1.881cm" svg:height="1.376cm" svg:x="4.681cm" svg:y="3.098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8" xml:id="id9" draw:id="id9" draw:layer="layout" svg:width="1.566cm" svg:height="1.741cm" draw:transform="rotate (-2.40942703237817) translate (9.502cm 4.33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8" xml:id="id3" draw:id="id3" draw:layer="layout" svg:width="1.566cm" svg:height="1.741cm" draw:transform="rotate (2.42949831877611) translate (8.448cm 10.413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8" xml:id="id1" draw:id="id1" draw:layer="layout" svg:width="1.566cm" svg:height="1.741cm" draw:transform="rotate (0.776322451287078) translate (1.356cm 8.94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8" xml:id="id7" draw:id="id7" draw:layer="layout" svg:width="1.675cm" svg:height="1.861cm" draw:transform="skewX (-0.00209439510239321) rotate (-0.808261976598574) translate (3.01cm 3.18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0" xml:id="id5" draw:id="id5" draw:layer="layout" svg:width="1.689cm" svg:height="1.689cm" svg:x="4.665cm" svg:y="5.466cm">
          <text:p text:style-name="P9"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9.796cm" svg:height="2.428cm" svg:x="2.143cm" svg:y="0.48cm">
          <draw:text-box>
            <text:p><text:span text:style-name="T2">Each input one at a time shown when i speak</text:span></text:p>
          </draw:text-box>
        </draw:frame>
        <draw:custom-shape draw:style-name="gr14" draw:text-style-name="P8" draw:layer="layout" svg:width="5.682cm" svg:height="5.626cm" svg:x="17.462cm" svg:y="3.899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position-x="$1" draw:handle-position-y="$2" draw:handle-range-x-minimum="$0" draw:handle-range-x-maximum="10800" draw:handle-range-y-minimum="0" draw:handle-range-y-maximum="$0"/>
            <draw:handle draw:handle-position="$0 top" draw:handle-position-x="$0" draw:handle-position-y="top" draw:handle-range-x-minimum="$2" draw:handle-range-x-maximum="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7" draw:text-style-name="P8" xml:id="id17" draw:id="id17" draw:layer="layout" svg:width="2.019cm" svg:height="1.932cm" svg:x="7.763cm" svg:y="5.361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8" xml:id="id15" draw:id="id15" draw:layer="layout" svg:width="1.881cm" svg:height="1.376cm" svg:x="1.722cm" svg:y="5.552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8" xml:id="id19" draw:id="id19" draw:layer="layout" svg:width="1.566cm" svg:height="1.741cm" draw:transform="rotate (-2.40942703237817) translate (17.614cm 6.617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" draw:text-style-name="P8" xml:id="id16" draw:id="id16" draw:layer="layout" svg:width="2.315cm" svg:height="2.298cm" svg:x="4.56cm" svg:y="5.1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6" xml:id="id18" draw:id="id18">
          <draw:custom-shape draw:style-name="gr17" draw:text-style-name="P8" draw:layer="layout" svg:width="2.959cm" svg:height="0.488cm" svg:x="10.932cm" svg:y="5.7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2.975cm" svg:height="0.452cm" svg:x="10.933cm" svg:y="6.737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8" xml:id="id12" draw:id="id12" draw:layer="layout" svg:width="2.019cm" svg:height="1.932cm" draw:transform="rotate (-1.55247036964896) translate (9.755cm 2.168cm)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8" xml:id="id10" draw:id="id10" draw:layer="layout" svg:width="1.881cm" svg:height="1.376cm" svg:x="1.757cm" svg:y="2.419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5" draw:text-style-name="P8" xml:id="id11" draw:id="id11" draw:layer="layout" svg:width="2.315cm" svg:height="2.298cm" svg:x="4.595cm" svg:y="1.9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6" xml:id="id13" draw:id="id13">
          <draw:custom-shape draw:style-name="gr17" draw:text-style-name="P8" draw:layer="layout" svg:width="2.959cm" svg:height="0.488cm" svg:x="10.967cm" svg:y="2.61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2.975cm" svg:height="0.452cm" svg:x="10.968cm" svg:y="3.604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0" xml:id="id14" draw:id="id14" draw:layer="layout" svg:width="1.689cm" svg:height="1.689cm" svg:x="15.614cm" svg:y="2.629cm">
          <text:p text:style-name="P9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g draw:style-name="gr16" xml:id="id20" draw:id="id20">
          <draw:custom-shape draw:style-name="gr7" draw:text-style-name="P8" draw:layer="layout" svg:width="2.019cm" svg:height="1.932cm" svg:x="7.746cm" svg:y="3.865cm">
            <text:p/>
            <draw:enhanced-geometry svg:viewBox="0 0 21600 21600" draw:text-areas="0 ?f0 ?f5 ?f2" draw:type="right-arrow" draw:modifiers="10808.269525268 5974.0936863543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style-name="gr10" draw:text-style-name="P8" draw:layer="layout" svg:width="1.881cm" svg:height="1.376cm" svg:x="1.705cm" svg:y="4.056cm">
            <text:p/>
            <draw:enhanced-geometry svg:viewBox="0 0 21600 21600" draw:text-areas="?f0 ?f7 ?f2 21600" draw:type="up-arrow" draw:modifiers="10650.9803921569 5531.26571668064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10800" draw:handle-range-y-minimum="0" draw:handle-range-y-maximum="21600" draw:handle-position="$1 $0" draw:handle-position-x="$1" draw:handle-position-y="$0"/>
            </draw:enhanced-geometry>
          </draw:custom-shape>
          <draw:custom-shape draw:style-name="gr15" draw:text-style-name="P8" draw:layer="layout" svg:width="2.315cm" svg:height="2.298cm" svg:x="4.543cm" svg:y="3.60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" draw:text-style-name="P8" draw:layer="layout" svg:width="2.019cm" svg:height="1.932cm" svg:x="21.533cm" svg:y="4.457cm">
            <text:p/>
            <draw:enhanced-geometry svg:viewBox="0 0 21600 21600" draw:text-areas="0 ?f0 ?f5 ?f2" draw:type="right-arrow" draw:modifiers="10808.269525268 5974.0936863543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g draw:style-name="gr16">
            <draw:custom-shape draw:style-name="gr17" draw:text-style-name="P8" draw:layer="layout" svg:width="2.959cm" svg:height="0.488cm" svg:x="17.669cm" svg:y="4.54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2.975cm" svg:height="0.452cm" svg:x="17.67cm" svg:y="5.5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8" draw:layer="layout" svg:width="2.019cm" svg:height="1.932cm" draw:transform="rotate (-1.55247036964896) translate (15.987cm 3.927cm)">
            <text:p/>
            <draw:enhanced-geometry svg:viewBox="0 0 21600 21600" draw:text-areas="0 ?f0 ?f5 ?f2" draw:type="right-arrow" draw:modifiers="10808.269525268 5974.0936863543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style-name="gr15" draw:text-style-name="P8" draw:layer="layout" svg:width="2.315cm" svg:height="2.298cm" svg:x="10.827cm" svg:y="3.72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16" xml:id="id21" draw:id="id21">
          <draw:custom-shape draw:style-name="gr7" draw:text-style-name="P8" draw:layer="layout" svg:width="2.019cm" svg:height="1.932cm" svg:x="7.659cm" svg:y="11.89cm">
            <text:p/>
            <draw:enhanced-geometry svg:viewBox="0 0 21600 21600" draw:text-areas="0 ?f0 ?f5 ?f2" draw:type="right-arrow" draw:modifiers="10808.269525268 5974.0936863543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style-name="gr10" draw:text-style-name="P8" draw:layer="layout" svg:width="1.881cm" svg:height="1.376cm" svg:x="1.618cm" svg:y="12.081cm">
            <text:p/>
            <draw:enhanced-geometry svg:viewBox="0 0 21600 21600" draw:text-areas="?f0 ?f7 ?f2 21600" draw:type="up-arrow" draw:modifiers="10650.9803921569 5531.26571668064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10800" draw:handle-range-y-minimum="0" draw:handle-range-y-maximum="21600" draw:handle-position="$1 $0" draw:handle-position-x="$1" draw:handle-position-y="$0"/>
            </draw:enhanced-geometry>
          </draw:custom-shape>
          <draw:custom-shape draw:style-name="gr15" draw:text-style-name="P8" draw:layer="layout" svg:width="2.315cm" svg:height="2.298cm" svg:x="4.456cm" svg:y="11.6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g draw:style-name="gr16">
            <draw:custom-shape draw:style-name="gr17" draw:text-style-name="P8" draw:layer="layout" svg:width="2.959cm" svg:height="0.488cm" svg:x="21.673cm" svg:y="12.7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2.975cm" svg:height="0.452cm" svg:x="21.674cm" svg:y="13.77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8" draw:layer="layout" svg:width="2.019cm" svg:height="1.932cm" draw:transform="rotate (-1.55247036964896) translate (15.9cm 11.952cm)">
            <text:p/>
            <draw:enhanced-geometry svg:viewBox="0 0 21600 21600" draw:text-areas="0 ?f0 ?f5 ?f2" draw:type="right-arrow" draw:modifiers="10808.269525268 5974.0936863543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style-name="gr15" draw:text-style-name="P8" draw:layer="layout" svg:width="2.315cm" svg:height="2.298cm" svg:x="10.74cm" svg:y="11.75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5" draw:text-style-name="P8" draw:layer="layout" svg:width="2.315cm" svg:height="2.298cm" svg:x="16.329cm" svg:y="11.89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1.566cm" svg:height="1.741cm" svg:x="19.252cm" svg:y="12.326cm">
            <text:p/>
            <draw:enhanced-geometry svg:viewBox="0 0 21600 21600" draw:text-areas="?f7 ?f0 21600 ?f2" draw:type="left-arrow" draw:modifiers="10793.1078493937 5823.2651023464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style-name="gr12" draw:text-style-name="P10" draw:layer="layout" svg:width="1.689cm" svg:height="1.689cm" svg:x="25.589cm" svg:y="12.832cm">
            <text:p text:style-name="P9"><text:span text:style-name="T2">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o do this in code</text:p>
          </draw:text-box>
        </draw:frame>
        <draw:frame draw:style-name="gr1" draw:text-style-name="P1" xml:id="id22" draw:id="id22" draw:layer="layout" svg:width="22.613cm" svg:height="15.122cm" svg:x="2.703cm" svg:y="0.628cm">
          <draw:image xlink:href="Pictures/100000010000033500000225D0DDC2C2.png" xlink:type="simple" xlink:show="embed" xlink:actuate="onLoad" draw:mime-type="image/png">
            <text:p/>
          </draw:image>
        </draw:frame>
        <draw:frame draw:style-name="gr1" draw:text-style-name="P1" xml:id="id23" draw:id="id23" draw:layer="layout" svg:width="18.443cm" svg:height="14.632cm" svg:x="3.008cm" svg:y="0.839cm">
          <draw:image xlink:href="Pictures/1000000100000262000001E419BA741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7" draw:text-style-name="P8" draw:layer="layout" svg:width="2.019cm" svg:height="1.932cm" svg:x="7.763cm" svg:y="5.361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8" draw:layer="layout" svg:width="1.566cm" svg:height="1.741cm" svg:x="1.532cm" svg:y="5.587cm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1.619cm" svg:height="1.618cm" svg:x="4.717cm" svg:y="8.27cm">
          <text:p/>
          <draw:enhanced-geometry svg:viewBox="0 0 21600 21600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0" draw:text-style-name="P8" draw:layer="layout" svg:width="1.881cm" svg:height="1.376cm" svg:x="4.681cm" svg:y="3.098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8" draw:layer="layout" svg:width="1.566cm" svg:height="1.741cm" draw:transform="rotate (-2.40942703237817) translate (9.502cm 4.336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8" draw:layer="layout" svg:width="1.566cm" svg:height="1.741cm" draw:transform="rotate (2.42949831877611) translate (8.448cm 10.413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8" draw:layer="layout" svg:width="1.566cm" svg:height="1.741cm" draw:transform="rotate (0.776322451287078) translate (1.356cm 8.945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8" draw:layer="layout" svg:width="1.566cm" svg:height="1.741cm" draw:transform="rotate (-0.807389311972577) translate (2.925cm 3.185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0" draw:layer="layout" svg:width="1.689cm" svg:height="1.689cm" svg:x="4.665cm" svg:y="5.466cm">
          <text:p text:style-name="P9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6.057cm" svg:height="6.458cm" svg:x="11.036cm" svg:y="3.429cm">
          <draw:text-box>
            <text:p><text:span text:style-name="T3">7 <text:s/>8 <text:s/>9</text:span></text:p>
            <text:p><text:span text:style-name="T3">4 <text:s/>5 <text:s/>6</text:span></text:p>
            <text:p><text:span text:style-name="T3">1 <text:s/>2 <text:s/>3</text:span></text:p>
          </draw:text-box>
        </draw:frame>
        <draw:frame draw:style-name="gr20" draw:text-style-name="P12" draw:layer="layout" svg:width="9.503cm" svg:height="7.137cm" svg:x="18.382cm" svg:y="3.533cm">
          <draw:text-box>
            <text:p><text:span text:style-name="T3">UL <text:s/>U </text:span><text:span text:style-name="T3"><text:s text:c="2"/>UR</text:span></text:p>
            <text:p><text:span text:style-name="T3">L <text:s text:c="4"/>N </text:span><text:span text:style-name="T3"><text:s text:c="4"/>R</text:span></text:p>
            <text:p><text:span text:style-name="T3">DL <text:s/>D </text:span><text:span text:style-name="T3"><text:s text:c="2"/>D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ypes of blocking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ages of sf6(regular and parry),smash br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How blocking works</text:p>
          </draw:text-box>
        </draw:frame>
        <draw:custom-shape draw:style-name="gr21" draw:text-style-name="P8" draw:layer="layout" svg:width="2.5cm" svg:height="2.5cm" draw:transform="rotate (-1.5707963267949) translate (7.767cm 3.71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8" draw:layer="layout" svg:width="2.5cm" svg:height="2.5cm" draw:transform="rotate (-1.5707963267949) translate (7.527cm 10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8" draw:layer="layout" svg:width="2.5cm" svg:height="2.5cm" draw:transform="rotate (-1.5707963267949) translate (9.654cm 7.0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3" draw:text-style-name="P8" draw:layer="layout" svg:width="6cm" svg:height="6cm" svg:x="13.12cm" svg:y="3.62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13" draw:layer="layout" svg:width="6cm" svg:height="6cm" svg:x="13.12cm" svg:y="7.2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o do this in code 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he subjective Projectile case </text:p>
          </draw:text-box>
        </draw:frame>
        <draw:custom-shape draw:style-name="gr23" draw:text-style-name="P8" draw:layer="layout" svg:width="6cm" svg:height="6cm" svg:x="13.12cm" svg:y="3.62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13" draw:layer="layout" svg:width="6cm" svg:height="6cm" svg:x="13.12cm" svg:y="7.2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8" draw:layer="layout" svg:width="2.5cm" svg:height="2.5cm" svg:x="6.56cm" svg:y="6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o do this in game engine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How to make an input manger for fighting games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909cm" svg:height="2.83cm" svg:x="2.736cm" svg:y="6.629cm">
          <draw:image xlink:href="Pictures/100000000000006E0000006B0DF23044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42cm" svg:y="9.761cm">
          <draw:image xlink:href="Pictures/100000000000006900000067659E7CB6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82cm" svg:y="3.598cm">
          <draw:image xlink:href="Pictures/1000000000000069000000670C489800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705cm" svg:y="6.669cm">
          <draw:image xlink:href="Pictures/1000000000000088000000862D9EE71B.png" xlink:type="simple" xlink:show="embed" xlink:actuate="onLoad" draw:mime-type="image/png">
            <text:p/>
          </draw:image>
        </draw:frame>
        <draw:frame draw:style-name="gr3" draw:text-style-name="P3" draw:layer="layout" svg:width="9.974cm" svg:height="9.577cm" svg:x="16.051cm" svg:y="3.703cm">
          <draw:image xlink:href="Pictures/10000000000001790000016A6B543D83.png" xlink:type="simple" xlink:show="embed" xlink:actuate="onLoad" draw:mime-type="image/png">
            <text:p/>
          </draw:image>
        </draw:frame>
        <draw:frame draw:style-name="gr4" draw:text-style-name="P4" draw:layer="layout" svg:width="2.909cm" svg:height="2.83cm" svg:x="2.627cm" svg:y="3.436cm">
          <draw:image xlink:href="Pictures/100000000000006E0000006BB829D614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513cm" svg:y="9.794cm">
          <draw:image xlink:href="Pictures/10000000000000880000008680787181.png" xlink:type="simple" xlink:show="embed" xlink:actuate="onLoad" draw:mime-type="image/png">
            <text:p/>
          </draw:image>
        </draw:frame>
        <draw:g draw:style-name="gr5">
          <draw:frame draw:style-name="gr6" draw:text-style-name="P5" draw:layer="layout" svg:width="2.909cm" svg:height="2.83cm" svg:x="2.847cm" svg:y="9.577cm">
            <draw:image xlink:href="Pictures/100000010000006E0000006B5201AA84.png" xlink:type="simple" xlink:show="embed" xlink:actuate="onLoad" draw:mime-type="image/png">
              <text:p/>
            </draw:image>
          </draw:frame>
          <draw:frame draw:style-name="gr6" draw:text-style-name="P5" draw:layer="layout" svg:width="2.777cm" svg:height="2.724cm" svg:x="2.979cm" svg:y="9.683cm">
            <draw:image xlink:href="Pictures/100000010000006900000067C4503B3C.png" xlink:type="simple" xlink:show="embed" xlink:actuate="onLoad" draw:mime-type="image/png">
              <text:p/>
            </draw:image>
          </draw:frame>
        </draw:g>
        <draw:g draw:style-name="gr5">
          <draw:frame draw:style-name="gr6" draw:text-style-name="P5" draw:layer="layout" svg:width="2.546cm" svg:height="2.497cm" svg:x="9.452cm" svg:y="3.589cm">
            <draw:image xlink:href="Pictures/100000010000006900000067EE585D43.png" xlink:type="simple" xlink:show="embed" xlink:actuate="onLoad" draw:mime-type="image/png">
              <text:p/>
            </draw:image>
          </draw:frame>
          <draw:frame draw:style-name="gr6" draw:text-style-name="P5" draw:layer="layout" svg:width="2.534cm" svg:height="2.497cm" svg:x="9.452cm" svg:y="3.589cm">
            <draw:image xlink:href="Pictures/1000000100000088000000865ABDF36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7" draw:text-style-name="P8" draw:layer="layout" svg:width="2.019cm" svg:height="1.932cm" svg:x="7.763cm" svg:y="5.36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8" draw:layer="layout" svg:width="1.566cm" svg:height="1.741cm" svg:x="1.532cm" svg:y="5.58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1.619cm" svg:height="1.618cm" svg:x="4.717cm" svg:y="8.2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0" draw:text-style-name="P8" draw:layer="layout" svg:width="1.881cm" svg:height="1.376cm" svg:x="4.681cm" svg:y="3.098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8" draw:layer="layout" svg:width="1.566cm" svg:height="1.741cm" draw:transform="rotate (-2.40942703237817) translate (9.502cm 4.33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8" draw:layer="layout" svg:width="1.566cm" svg:height="1.741cm" draw:transform="rotate (2.42949831877611) translate (8.448cm 10.413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8" draw:layer="layout" svg:width="1.566cm" svg:height="1.741cm" draw:transform="rotate (0.776322451287078) translate (1.356cm 8.94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8" draw:layer="layout" svg:width="1.675cm" svg:height="1.861cm" draw:transform="skewX (-0.00209439510239321) rotate (-0.808261976598574) translate (3.01cm 3.18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0" draw:layer="layout" svg:width="1.689cm" svg:height="1.689cm" svg:x="4.665cm" svg:y="5.466cm">
          <text:p text:style-name="P9"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9.796cm" svg:height="2.428cm" svg:x="2.143cm" svg:y="0.48cm">
          <draw:text-box>
            <text:p><text:span text:style-name="T2">Each </text:span><text:span text:style-name="T2">input one </text:span><text:span text:style-name="T2">at a time </text:span><text:span text:style-name="T2">shown </text:span><text:span text:style-name="T2">when i </text:span><text:span text:style-name="T2">speak</text:span></text:p>
          </draw:text-box>
        </draw:frame>
        <draw:custom-shape draw:style-name="gr15" draw:text-style-name="P8" draw:layer="layout" svg:width="2.315cm" svg:height="2.298cm" svg:x="10.829cm" svg:y="3.72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6">
          <draw:custom-shape draw:style-name="gr17" draw:text-style-name="P8" draw:layer="layout" svg:width="2.959cm" svg:height="0.488cm" svg:x="11.452cm" svg:y="7.79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2.975cm" svg:height="0.452cm" svg:x="11.453cm" svg:y="8.78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7" draw:text-style-name="P8" draw:layer="layout" svg:width="2.019cm" svg:height="1.932cm" svg:x="7.535cm" svg:y="1.078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1.619cm" svg:height="1.618cm" svg:x="2.243cm" svg:y="1.43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8" draw:layer="layout" svg:width="1.566cm" svg:height="1.741cm" draw:transform="rotate (2.42949831877611) translate (6.075cm 3.43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6" draw:text-style-name="P11" draw:layer="layout" svg:width="3.492cm" svg:height="3.095cm" svg:x="21.863cm" svg:y="1.09cm">
          <draw:text-box>
            <text:p><text:span text:style-name="T2">Some attack</text:span></text:p>
            <text:p><text:span text:style-name="T2">DQCF+LP</text:span></text:p>
            <text:p><text:span text:style-name="T2"/></text:p>
          </draw:text-box>
        </draw:frame>
        <draw:frame draw:style-name="gr3" draw:text-style-name="P3" draw:layer="layout" svg:width="2.909cm" svg:height="2.83cm" svg:x="12.959cm" svg:y="0.975cm">
          <draw:image xlink:href="Pictures/100000000000006E0000006B0DF23044.png" xlink:type="simple" xlink:show="embed" xlink:actuate="onLoad" draw:mime-type="image/png">
            <text:p/>
          </draw:image>
        </draw:frame>
        <draw:custom-shape draw:style-name="gr15" draw:text-style-name="P8" draw:layer="layout" svg:width="2.315cm" svg:height="2.298cm" svg:x="10.011cm" svg:y="1.08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6">
          <draw:custom-shape draw:style-name="gr17" draw:text-style-name="P8" draw:layer="layout" svg:width="2.959cm" svg:height="0.488cm" svg:x="17.581cm" svg:y="1.5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2.975cm" svg:height="0.452cm" svg:x="17.582cm" svg:y="2.522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8" draw:layer="layout" svg:width="2.019cm" svg:height="1.932cm" svg:x="1.958cm" svg:y="4.88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1.619cm" svg:height="1.618cm" svg:x="4.565cm" svg:y="5.148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8" draw:layer="layout" svg:width="1.566cm" svg:height="1.741cm" draw:transform="rotate (2.42949831877611) translate (8.017cm 6.90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7" draw:text-style-name="P11" draw:layer="layout" svg:width="3.492cm" svg:height="3.806cm" svg:x="21.711cm" svg:y="4.954cm">
          <draw:text-box>
            <text:p><text:span text:style-name="T2">Some other attack</text:span></text:p>
            <text:p text:style-name="P14"><text:span text:style-name="T2">FDPD+LP</text:span></text:p>
            <text:p><text:span text:style-name="T2"/></text:p>
          </draw:text-box>
        </draw:frame>
        <draw:frame draw:style-name="gr3" draw:text-style-name="P3" draw:layer="layout" svg:width="2.909cm" svg:height="2.83cm" svg:x="12.807cm" svg:y="4.839cm">
          <draw:image xlink:href="Pictures/100000000000006E0000006B0DF23044.png" xlink:type="simple" xlink:show="embed" xlink:actuate="onLoad" draw:mime-type="image/png">
            <text:p/>
          </draw:image>
        </draw:frame>
        <draw:custom-shape draw:style-name="gr15" draw:text-style-name="P8" draw:layer="layout" svg:width="2.315cm" svg:height="2.298cm" svg:x="9.859cm" svg:y="4.94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6">
          <draw:custom-shape draw:style-name="gr17" draw:text-style-name="P8" draw:layer="layout" svg:width="2.959cm" svg:height="0.488cm" svg:x="17.429cm" svg:y="5.39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2.975cm" svg:height="0.452cm" svg:x="17.43cm" svg:y="6.386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8" draw:layer="layout" svg:width="1.566cm" svg:height="1.741cm" svg:x="7.623cm" svg:y="8.251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1.619cm" svg:height="1.618cm" svg:x="1.843cm" svg:y="8.593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8" draw:layer="layout" svg:width="1.566cm" svg:height="1.741cm" draw:transform="rotate (0.776322451287078) translate (4.287cm 9.05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" draw:text-style-name="P3" draw:layer="layout" svg:width="2.534cm" svg:height="2.497cm" svg:x="13.17cm" svg:y="7.984cm">
          <draw:image xlink:href="Pictures/1000000000000088000000862D9EE71B.png" xlink:type="simple" xlink:show="embed" xlink:actuate="onLoad" draw:mime-type="image/png">
            <text:p/>
          </draw:image>
        </draw:frame>
        <draw:custom-shape draw:style-name="gr15" draw:text-style-name="P8" draw:layer="layout" svg:width="2.315cm" svg:height="2.298cm" svg:x="9.955cm" svg:y="8.0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6">
          <draw:custom-shape draw:style-name="gr17" draw:text-style-name="P8" draw:layer="layout" svg:width="2.959cm" svg:height="0.488cm" svg:x="17.505cm" svg:y="8.76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2.975cm" svg:height="0.452cm" svg:x="17.506cm" svg:y="9.755cm">
            <text:p/>
            <draw:enhanced-geometry svg:viewBox="0 0 21600 21600" draw:type="rectangle" draw:enhanced-path="M 0 0 L 21600 0 21600 21600 0 21600 0 0 Z N"/>
          </draw:custom-shape>
        </draw:g>
        <draw:frame draw:style-name="gr28" draw:text-style-name="P11" draw:layer="layout" svg:width="4.29cm" svg:height="4.517cm" svg:x="21.902cm" svg:y="8.552cm">
          <draw:text-box>
            <text:p><text:span text:style-name="T2">Some other other attack</text:span></text:p>
            <text:p text:style-name="P14"><text:span text:style-name="T2">DQCB e+HK</text:span></text:p>
            <text:p><text:span text:style-name="T2"/></text:p>
          </draw:text-box>
        </draw:frame>
        <draw:frame draw:style-name="gr29" draw:text-style-name="P11" draw:layer="layout" svg:width="5.775cm" svg:height="0.962cm" svg:x="21.235cm" svg:y="0.094cm">
          <draw:text-box>
            <text:p><text:span text:style-name="T2">Add images 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custom-shape draw:style-name="gr7" draw:text-style-name="P8" draw:layer="layout" svg:width="2.019cm" svg:height="1.932cm" svg:x="15.377cm" svg:y="0.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1.619cm" svg:height="1.618cm" svg:x="10.085cm" svg:y="0.809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8" draw:layer="layout" svg:width="1.566cm" svg:height="1.741cm" draw:transform="rotate (2.42949831877611) translate (13.917cm 2.80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8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8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8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1.619cm" svg:height="1.618cm" svg:x="1.805cm" svg:y="6.00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8" draw:layer="layout" svg:width="1.566cm" svg:height="1.741cm" draw:transform="rotate (0.776322451287078) translate (4.325cm 6.37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0" draw:layer="layout" svg:width="1.689cm" svg:height="1.689cm" svg:x="10.985cm" svg:y="5.6cm">
          <text:p text:style-name="P9"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2.019cm" svg:height="1.932cm" svg:x="13.38cm" svg:y="9.11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1.619cm" svg:height="1.618cm" svg:x="8.088cm" svg:y="9.4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8" draw:layer="layout" svg:width="1.566cm" svg:height="1.741cm" draw:transform="rotate (2.42949831877611) translate (11.92cm 11.46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0" draw:layer="layout" svg:width="1.689cm" svg:height="1.689cm" svg:x="19.876cm" svg:y="9.466cm">
          <text:p text:style-name="P9"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689cm" svg:height="1.689cm" svg:x="17.172cm" svg:y="9.37cm">
          <text:p text:style-name="P9"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689cm" svg:height="1.689cm" svg:x="2.039cm" svg:y="9.465cm">
          <text:p text:style-name="P9"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689cm" svg:height="1.689cm" svg:x="4.952cm" svg:y="9.37cm">
          <text:p text:style-name="P9"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689cm" svg:height="1.689cm" svg:x="22.845cm" svg:y="5.22cm">
          <text:p text:style-name="P9"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689cm" svg:height="1.689cm" svg:x="22.94cm" svg:y="9.751cm">
          <text:p text:style-name="P9"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5" draw:layer="layout" svg:width="2.874cm" svg:height="1.673cm" svg:x="2.037cm" svg:y="3.693cm">
          <draw:text-box>
            <text:p text:style-name="P14">oldest</text:p>
          </draw:text-box>
        </draw:frame>
        <draw:frame draw:style-name="gr31" draw:text-style-name="P16" draw:layer="layout" svg:width="3.116cm" svg:height="1.673cm" svg:x="22.727cm" svg:y="12.405cm">
          <draw:text-box>
            <text:p>Newest</text:p>
          </draw:text-box>
        </draw:frame>
        <draw:frame draw:style-name="gr32" draw:text-style-name="P17" draw:layer="layout" svg:width="6.643cm" svg:height="2.986cm" svg:x="2.209cm" svg:y="0.459cm">
          <draw:text-box>
            <text:p text:style-name="P14">A scanner of the inputs showing when a code is valid slowly</text:p>
          </draw:text-box>
        </draw:frame>
        <draw:custom-shape draw:style-name="gr33" draw:text-style-name="P18" draw:layer="layout" svg:width="5.558cm" svg:height="3.96cm" svg:x="4.073cm" svg:y="4.49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5.558cm" svg:height="3.96cm" svg:x="4.073cm" svg:y="4.49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9.497cm" svg:height="3.96cm" svg:x="7.08cm" svg:y="4.49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5.558cm" svg:height="3.96cm" svg:x="4.073cm" svg:y="4.49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6.946cm" svg:height="3.96cm" svg:x="9.631cm" svg:y="4.49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8.778cm" svg:height="3.96cm" svg:x="7.782cm" svg:y="8.45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5.155cm" svg:height="3.96cm" svg:x="16.577cm" svg:y="4.4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custom-shape draw:style-name="gr7" draw:text-style-name="P8" draw:layer="layout" svg:width="2.019cm" svg:height="1.932cm" svg:x="15.377cm" svg:y="0.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1.619cm" svg:height="1.618cm" svg:x="10.085cm" svg:y="0.809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8" draw:layer="layout" svg:width="1.566cm" svg:height="1.741cm" draw:transform="rotate (2.42949831877611) translate (13.917cm 2.80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8" draw:layer="layout" svg:width="2.019cm" svg:height="1.932cm" svg:x="20.1cm" svg:y="9.22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1.619cm" svg:height="1.618cm" svg:x="1.768cm" svg:y="9.6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8" draw:layer="layout" svg:width="1.566cm" svg:height="1.741cm" draw:transform="rotate (2.42949831877611) translate (11.92cm 11.46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0" draw:layer="layout" svg:width="1.689cm" svg:height="1.689cm" svg:x="4.643cm" svg:y="9.713cm">
          <text:p text:style-name="P9"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689cm" svg:height="1.689cm" svg:x="8.036cm" svg:y="9.712cm">
          <text:p text:style-name="P9"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689cm" svg:height="1.689cm" svg:x="22.94cm" svg:y="9.751cm">
          <text:p text:style-name="P9"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5" draw:layer="layout" svg:width="2.874cm" svg:height="1.673cm" svg:x="2.037cm" svg:y="3.693cm">
          <draw:text-box>
            <text:p text:style-name="P14">oldest</text:p>
          </draw:text-box>
        </draw:frame>
        <draw:frame draw:style-name="gr31" draw:text-style-name="P16" draw:layer="layout" svg:width="3.116cm" svg:height="1.673cm" svg:x="22.727cm" svg:y="12.405cm">
          <draw:text-box>
            <text:p>Newest</text:p>
          </draw:text-box>
        </draw:frame>
        <draw:frame draw:style-name="gr39" draw:text-style-name="P17" draw:layer="layout" svg:width="6.643cm" svg:height="3.806cm" svg:x="1.771cm" svg:y="0cm">
          <draw:text-box>
            <text:p text:style-name="P14">A scanner of the inputs showing when a code is valid slowly and this time with gaps</text:p>
          </draw:text-box>
        </draw:frame>
        <draw:custom-shape draw:style-name="gr40" draw:text-style-name="P18" draw:layer="layout" svg:width="3.045cm" svg:height="3.96cm" svg:x="19.432cm" svg:y="8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8" draw:layer="layout" svg:width="1.566cm" svg:height="1.741cm" draw:transform="rotate (2.42949831877611) translate (14.851cm 11.64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8" draw:layer="layout" svg:width="1.566cm" svg:height="1.741cm" draw:transform="rotate (2.42949831877611) translate (17.745cm 11.60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1" draw:text-style-name="P18" draw:layer="layout" svg:width="2.475cm" svg:height="3.96cm" svg:x="10.602cm" svg:y="8.4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2.132cm" svg:height="3.96cm" svg:x="1.618cm" svg:y="8.4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800080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fill="solid" draw:fill-color="#000000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21:17:20.095993390</meta:creation-date>
    <dc:date>2026-05-14T17:03:07.938188357</dc:date>
    <meta:editing-duration>PT1H18M20S</meta:editing-duration>
    <meta:editing-cycles>5</meta:editing-cycles>
    <meta:generator>LibreOffice/25.8.6.2$Linux_X86_64 LibreOffice_project/a46b460d1686bb49c718d2ef5f88b83ff2dc4981</meta:generator>
    <meta:document-statistic meta:object-count="256"/>
  </office:meta>
</office:document-meta>
</file>