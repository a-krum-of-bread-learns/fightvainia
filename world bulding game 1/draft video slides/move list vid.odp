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8000001DCA22A7877.png" manifest:media-type="image/png"/>
  <manifest:file-entry manifest:full-path="Pictures/100000000000006E0000006B0DF23044.png" manifest:media-type="image/png"/>
  <manifest:file-entry manifest:full-path="Pictures/1000000000000A00000004E2CF2C30C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svg:stroke-width="0cm" draw:marker-start-width="0.2cm" draw:marker-end-width="0.2cm" draw:textarea-horizontal-align="justify" draw:textarea-vertical-align="middle" draw:auto-grow-height="false" fo:min-height="0.614cm" fo:min-width="1.069cm" fo:padding-top="0.125cm" fo:padding-bottom="0.125cm" fo:padding-left="0.25cm" fo:padding-right="0.2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614cm" fo:min-width="1.069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96cm" fo:min-width="0.41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96cm" fo:min-width="0.317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553cm" fo:min-width="0.70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609cm" fo:min-width="0.791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945cm" fo:min-width="0.695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53cm" fo:min-width="0.706cm" loext:decorative="false"/>
    </style:style>
    <style:style style:name="gr12" style:family="graphic" style:parent-style-name="Default_20_Drawing_20_Style_5f_1">
      <style:graphic-properties draw:textarea-horizontal-align="justify" draw:textarea-vertical-align="middle" draw:auto-grow-height="false" fo:min-height="0.796cm" fo:min-width="0.419cm" loext:decorative="false"/>
    </style:style>
    <style:style style:name="gr13" style:family="graphic" style:parent-style-name="Default_20_Drawing_20_Style_5f_1">
      <style:graphic-properties draw:textarea-horizontal-align="justify" draw:textarea-vertical-align="middle" draw:auto-grow-height="false" fo:min-height="0.553cm" fo:min-width="0.707cm" loext:decorative="false"/>
    </style:style>
    <style:style style:name="gr14" style:family="graphic" style:parent-style-name="Object_20_with_20_no_20_fill_20_and_20_no_20_line_5f_1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1">
      <style:graphic-properties draw:textarea-horizontal-align="justify" draw:textarea-vertical-align="middle" draw:auto-grow-height="false" fo:min-height="0.118cm" fo:min-width="0cm" loext:decorative="false"/>
    </style:style>
    <style:style style:name="gr16" style:family="graphic" style:parent-style-name="Default_20_Drawing_20_Style_5f_1">
      <style:graphic-properties draw:textarea-horizontal-align="justify" draw:textarea-vertical-align="middle" draw:auto-grow-height="false" fo:min-height="0.046cm" fo:min-width="0cm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019cm" svg:height="1.932cm" svg:x="11.083cm" svg:y="0.38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1" draw:layer="layout" svg:width="2.019cm" svg:height="1.932cm" svg:x="2.375cm" svg:y="4.2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" draw:text-style-name="P1" draw:layer="layout" svg:width="1.881cm" svg:height="1.376cm" svg:x="10.262cm" svg:y="8.25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4" draw:text-style-name="P1" draw:layer="layout" svg:width="1.619cm" svg:height="1.618cm" svg:x="2.373cm" svg:y="8.146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1" draw:layer="layout" svg:width="1.566cm" svg:height="1.741cm" draw:transform="rotate (2.42949831877611) translate (6.058cm 13.2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1" draw:layer="layout" svg:width="2.019cm" svg:height="1.932cm" svg:x="7.759cm" svg:y="4.1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1" draw:layer="layout" svg:width="1.619cm" svg:height="1.618cm" svg:x="0.488cm" svg:y="8.146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4" draw:text-style-name="P1" draw:layer="layout" svg:width="1.619cm" svg:height="1.618cm" svg:x="6.546cm" svg:y="8.146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4" draw:text-style-name="P1" draw:layer="layout" svg:width="1.619cm" svg:height="1.618cm" svg:x="8.361cm" svg:y="8.146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4" draw:text-style-name="P1" draw:layer="layout" svg:width="1.619cm" svg:height="1.618cm" svg:x="4.543cm" svg:y="8.146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2" draw:text-style-name="P1" draw:layer="layout" svg:width="2.019cm" svg:height="1.932cm" svg:x="0.758cm" svg:y="11.17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svg:x="17.482cm" svg:y="9.034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" draw:text-style-name="P1" draw:layer="layout" svg:width="1.881cm" svg:height="1.376cm" svg:x="19.547cm" svg:y="7.23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1" draw:layer="layout" svg:width="1.566cm" svg:height="1.741cm" draw:transform="rotate (-2.40942703237817) translate (24.043cm 8.347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2.42949831877611) translate (23.074cm 11.5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0.776322451287078) translate (17.003cm 8.18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" draw:text-style-name="P1" draw:layer="layout" svg:width="1.675cm" svg:height="1.861cm" draw:transform="skewX (-0.00209439510239321) rotate (-0.808261976598574) translate (20.999cm 8.64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3" draw:layer="layout" svg:width="1.689cm" svg:height="1.689cm" svg:x="5.305cm" svg:y="4.206cm">
          <text:p text:style-name="P2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19cm" svg:height="1.618cm" svg:x="3.244cm" svg:y="11.33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1" draw:layer="layout" svg:width="1.566cm" svg:height="1.741cm" draw:transform="rotate (2.42949831877611) translate (3.325cm 2.87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1" draw:layer="layout" svg:width="1.619cm" svg:height="1.618cm" svg:x="0.511cm" svg:y="0.94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1" draw:layer="layout" svg:width="1.566cm" svg:height="1.741cm" draw:transform="rotate (2.42949831877611) translate (10.005cm 2.7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1" draw:layer="layout" svg:width="2.019cm" svg:height="1.932cm" svg:x="4.705cm" svg:y="0.61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1" draw:layer="layout" svg:width="1.619cm" svg:height="1.618cm" svg:x="7.191cm" svg:y="0.77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" draw:text-style-name="P1" draw:layer="layout" svg:width="2.019cm" svg:height="1.932cm" svg:x="23.966cm" svg:y="0.45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2.42949831877611) translate (22.888cm 2.76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1" draw:layer="layout" svg:width="1.619cm" svg:height="1.618cm" svg:x="20.074cm" svg:y="0.8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3" draw:layer="layout" svg:width="1.689cm" svg:height="1.689cm" svg:x="0.491cm" svg:y="4.445cm">
          <text:p text:style-name="P2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66cm" svg:height="1.741cm" svg:x="17.569cm" svg:y="12.895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" draw:text-style-name="P1" draw:layer="layout" svg:width="1.881cm" svg:height="1.376cm" svg:x="19.634cm" svg:y="11.1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1" draw:layer="layout" svg:width="1.566cm" svg:height="1.741cm" draw:transform="rotate (-2.40942703237817) translate (24.13cm 12.20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2.42949831877611) translate (23.161cm 15.401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0.776322451287078) translate (17.09cm 12.0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" draw:text-style-name="P1" draw:layer="layout" svg:width="1.675cm" svg:height="1.861cm" draw:transform="skewX (-0.00209439510239321) rotate (-0.808261976598574) translate (21.086cm 12.50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.019cm" svg:height="1.932cm" svg:x="11.083cm" svg:y="0.386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1" draw:layer="layout" svg:width="2.019cm" svg:height="1.932cm" svg:x="2.375cm" svg:y="4.2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" draw:text-style-name="P1" draw:layer="layout" svg:width="1.881cm" svg:height="1.376cm" svg:x="10.262cm" svg:y="8.255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4" draw:text-style-name="P1" draw:layer="layout" svg:width="1.619cm" svg:height="1.618cm" svg:x="2.373cm" svg:y="8.146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1" draw:layer="layout" svg:width="1.566cm" svg:height="1.741cm" draw:transform="rotate (2.42949831877611) translate (6.058cm 13.2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1" draw:layer="layout" svg:width="2.019cm" svg:height="1.932cm" svg:x="7.759cm" svg:y="4.145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1" draw:layer="layout" svg:width="1.619cm" svg:height="1.618cm" svg:x="0.488cm" svg:y="8.146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4" draw:text-style-name="P1" draw:layer="layout" svg:width="1.619cm" svg:height="1.618cm" svg:x="6.546cm" svg:y="8.146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4" draw:text-style-name="P1" draw:layer="layout" svg:width="1.619cm" svg:height="1.618cm" svg:x="8.361cm" svg:y="8.146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4" draw:text-style-name="P1" draw:layer="layout" svg:width="1.619cm" svg:height="1.618cm" svg:x="4.543cm" svg:y="8.146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2" draw:text-style-name="P1" draw:layer="layout" svg:width="2.019cm" svg:height="1.932cm" svg:x="0.758cm" svg:y="11.17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svg:x="17.482cm" svg:y="9.034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" draw:text-style-name="P1" draw:layer="layout" svg:width="1.881cm" svg:height="1.376cm" svg:x="19.547cm" svg:y="7.239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1" draw:layer="layout" svg:width="1.566cm" svg:height="1.741cm" draw:transform="rotate (-2.40942703237817) translate (24.043cm 8.347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2.42949831877611) translate (23.074cm 11.5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0.776322451287078) translate (17.003cm 8.184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" draw:text-style-name="P1" draw:layer="layout" svg:width="1.675cm" svg:height="1.861cm" draw:transform="skewX (-0.00209439510239321) rotate (-0.808261976598574) translate (20.999cm 8.64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3" draw:layer="layout" svg:width="1.689cm" svg:height="1.689cm" svg:x="5.305cm" svg:y="4.206cm">
          <text:p text:style-name="P2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19cm" svg:height="1.618cm" svg:x="3.244cm" svg:y="11.33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1" draw:layer="layout" svg:width="1.566cm" svg:height="1.741cm" draw:transform="rotate (2.42949831877611) translate (3.325cm 2.87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1" draw:layer="layout" svg:width="1.619cm" svg:height="1.618cm" svg:x="0.511cm" svg:y="0.947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1" draw:layer="layout" svg:width="1.566cm" svg:height="1.741cm" draw:transform="rotate (2.42949831877611) translate (10.005cm 2.7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1" draw:layer="layout" svg:width="2.019cm" svg:height="1.932cm" svg:x="4.705cm" svg:y="0.61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1" draw:layer="layout" svg:width="1.619cm" svg:height="1.618cm" svg:x="7.191cm" svg:y="0.77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" draw:text-style-name="P1" draw:layer="layout" svg:width="2.019cm" svg:height="1.932cm" svg:x="23.966cm" svg:y="0.452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2.42949831877611) translate (22.888cm 2.76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1" draw:layer="layout" svg:width="1.619cm" svg:height="1.618cm" svg:x="20.074cm" svg:y="0.84cm">
          <text:p/>
          <draw:enhanced-geometry svg:viewBox="0 0 21600 21600" draw:mirror-horizontal="false" draw:mirror-vertical="false" draw:text-areas="?f0 0 ?f2 ?f5" draw:type="down-arrow" draw:modifiers="10795.5056179775 5346.666666666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3" draw:layer="layout" svg:width="1.689cm" svg:height="1.689cm" svg:x="0.491cm" svg:y="4.445cm">
          <text:p text:style-name="P2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66cm" svg:height="1.741cm" svg:x="17.569cm" svg:y="12.895cm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" draw:text-style-name="P1" draw:layer="layout" svg:width="1.881cm" svg:height="1.376cm" svg:x="19.634cm" svg:y="11.1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5" draw:text-style-name="P1" draw:layer="layout" svg:width="1.566cm" svg:height="1.741cm" draw:transform="rotate (-2.40942703237817) translate (24.13cm 12.20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2.42949831877611) translate (23.161cm 15.401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0.776322451287078) translate (17.09cm 12.0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" draw:text-style-name="P1" draw:layer="layout" svg:width="1.675cm" svg:height="1.861cm" draw:transform="skewX (-0.00209439510239321) rotate (-0.808261976598574) translate (21.086cm 12.509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9" draw:text-style-name="P5" draw:layer="layout" svg:width="7.547cm" svg:height="2.384cm" svg:x="13.121cm" svg:y="4.055cm">
          <draw:text-box>
            <text:p>This or scroll of my code </text:p>
          </draw:text-box>
        </draw:frame>
        <presentation:notes draw:style-name="dp3">
          <draw:page-thumbnail draw:style-name="gr8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0" draw:text-style-name="P1" draw:layer="layout" svg:width="27.999cm" svg:height="13.67cm" svg:x="0.053cm" svg:y="1.059cm">
          <draw:image xlink:href="Pictures/1000000000000A00000004E2CF2C30CE.jpg" xlink:type="simple" xlink:show="embed" xlink:actuate="onLoad" draw:mime-type="image/jpeg">
            <text:p/>
          </draw:image>
        </draw:frame>
        <draw:custom-shape draw:style-name="gr5" draw:text-style-name="P1" draw:layer="layout" svg:width="1.566cm" svg:height="1.741cm" draw:transform="rotate (2.42949831877611) translate (13.786cm 6.40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5cm" svg:height="1.741cm" draw:transform="rotate (2.42949831877611) translate (16.061cm 10.525cm)">
          <text:p/>
          <draw:enhanced-geometry svg:viewBox="0 0 21600 21600" draw:mirror-horizontal="true" draw:mirror-vertical="tru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2.42949831877611) translate (19.36cm 5.648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2.42949831877611) translate (17.559cm 5.345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1.566cm" svg:height="1.741cm" draw:transform="rotate (2.42949831877611) translate (15.759cm 5.453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" draw:layer="layout" svg:width="1.565cm" svg:height="1.741cm" draw:transform="rotate (2.42949831877611) translate (21.071cm 9.55cm)">
          <text:p/>
          <draw:enhanced-geometry svg:viewBox="0 0 21600 21600" draw:mirror-horizontal="true" draw:mirror-vertical="tru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" draw:layer="layout" svg:width="1.565cm" svg:height="1.741cm" draw:transform="rotate (2.42949831877611) translate (19.251cm 9.463cm)">
          <text:p/>
          <draw:enhanced-geometry svg:viewBox="0 0 21600 21600" draw:mirror-horizontal="true" draw:mirror-vertical="tru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" draw:layer="layout" svg:width="1.565cm" svg:height="1.741cm" draw:transform="rotate (2.42949831877611) translate (17.364cm 9.767cm)">
          <text:p/>
          <draw:enhanced-geometry svg:viewBox="0 0 21600 21600" draw:mirror-horizontal="true" draw:mirror-vertical="tru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.019cm" svg:height="1.932cm" svg:x="1.021cm" svg:y="0.841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" draw:layer="layout" svg:width="1.881cm" svg:height="1.376cm" svg:x="6.458cm" svg:y="1.171cm">
          <text:p/>
          <draw:enhanced-geometry svg:viewBox="0 0 21600 21600" draw:mirror-horizontal="false" draw:mirror-vertical="false" draw:text-areas="?f0 ?f7 ?f2 21600" draw:type="up-arrow" draw:modifiers="10650.9803921569 5531.265716680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3" draw:text-style-name="P1" draw:layer="layout" svg:width="1.566cm" svg:height="1.741cm" draw:transform="rotate (-2.40942703237817) translate (5.909cm 1.96cm)">
          <text:p/>
          <draw:enhanced-geometry svg:viewBox="0 0 21600 21600" draw:mirror-horizontal="false" draw:mirror-vertical="false" draw:text-areas="?f7 ?f0 21600 ?f2" draw:type="left-arrow" draw:modifiers="10793.1078493937 5823.265102346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4" draw:text-style-name="P6" draw:layer="layout" svg:width="2.909cm" svg:height="2.83cm" svg:x="12.825cm" svg:y="0.452cm">
          <draw:image xlink:href="Pictures/100000000000006E0000006B0DF23044.png" xlink:type="simple" xlink:show="embed" xlink:actuate="onLoad" draw:mime-type="image/png">
            <text:p/>
          </draw:image>
        </draw:frame>
        <draw:custom-shape draw:style-name="gr15" draw:text-style-name="P1" draw:layer="layout" svg:width="2.315cm" svg:height="2.298cm" svg:x="9.806cm" svg:y="0.83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" draw:layer="layout" svg:width="2.315cm" svg:height="2.298cm" svg:x="16.352cm" svg:y="0.9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75.542691751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" draw:layer="layout" svg:width="0.464cm" svg:height="0.418cm" svg:x="20.625cm" svg:y="2.6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64cm" svg:height="0.418cm" svg:x="19.697cm" svg:y="2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64cm" svg:height="0.418cm" svg:x="20.161cm" svg:y="2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8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1.971cm" svg:height="15.75cm" svg:x="3.015cm" svg:y="0cm">
          <draw:image xlink:href="Pictures/1000000100000298000001DCA22A7877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1.971cm" svg:height="15.75cm" svg:x="3.015cm" svg:y="0cm">
          <draw:image xlink:href="Pictures/1000000100000298000001DCA22A7877.png" xlink:type="simple" xlink:show="embed" xlink:actuate="onLoad" draw:mime-type="image/png">
            <text:p/>
          </draw:image>
        </draw:frame>
        <draw:custom-shape draw:style-name="gr1" draw:text-style-name="P1" draw:layer="layout" svg:width="2.019cm" svg:height="1.932cm" svg:x="14.229cm" svg:y="1.773cm">
          <text:p/>
          <draw:enhanced-geometry svg:viewBox="0 0 21600 21600" draw:mirror-horizontal="false" draw:mirror-vertical="false" draw:text-areas="0 ?f0 ?f5 ?f2" draw:type="right-arrow" draw:modifiers="10808.269525268 5974.093686354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3">
          <draw:page-thumbnail draw:style-name="gr8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presentation:notes draw:style-name="dp3">
          <draw:page-thumbnail draw:style-name="gr8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draw:stroke-dash="Dash_20_Dot_20_4" draw:fill="solid" draw:fill-color="#800080"/>
      <style:paragraph-properties loext:tab-stop-distance="0cm">
        <style:tab-stops/>
      </style:paragraph-properties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15:12:04.915294259</meta:creation-date>
    <dc:date>2026-06-13T17:19:05.687218371</dc:date>
    <meta:editing-duration>PT1H45M58S</meta:editing-duration>
    <meta:editing-cycles>1</meta:editing-cycles>
    <meta:document-statistic meta:object-count="125"/>
    <meta:generator>LibreOffice/26.2.3.2$Linux_X86_64 LibreOffice_project/d4d5ed47b6084125f28d269a5650105d54dde034</meta:generator>
  </office:meta>
</office:document-meta>
</file>